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80000005D61742D1D.png" manifest:media-type="image/png"/>
  <manifest:file-entry manifest:full-path="Pictures/10000000000002DB000000C6EF728FDE.png" manifest:media-type="image/png"/>
  <manifest:file-entry manifest:full-path="Pictures/1000000100000480000000A023AA4382.png" manifest:media-type="image/png"/>
  <manifest:file-entry manifest:full-path="Pictures/10000001000004600000006C03B77FCB.png" manifest:media-type="image/png"/>
  <manifest:file-entry manifest:full-path="Pictures/10000001000004540000008C47EA4463.png" manifest:media-type="image/png"/>
  <manifest:file-entry manifest:full-path="Pictures/10000001000004570000013F9B69A41D.png" manifest:media-type="image/png"/>
  <manifest:file-entry manifest:full-path="Pictures/10000001000004260000006A7798D147.png" manifest:media-type="image/png"/>
  <manifest:file-entry manifest:full-path="Pictures/100000010000046700000236B0AA7707.png" manifest:media-type="image/png"/>
  <manifest:file-entry manifest:full-path="Pictures/100000010000028A000000F5D6D6E43E.png" manifest:media-type="image/png"/>
  <manifest:file-entry manifest:full-path="Pictures/10000001000000F200000082F50B02C9.png" manifest:media-type="image/png"/>
  <manifest:file-entry manifest:full-path="Pictures/100000010000039F0000007941369161.png" manifest:media-type="image/png"/>
  <manifest:file-entry manifest:full-path="Pictures/10000001000002FE0000002ABD69A71A.png" manifest:media-type="image/png"/>
  <manifest:file-entry manifest:full-path="Pictures/100000010000042B0000012738DD8E0C.png" manifest:media-type="image/png"/>
  <manifest:file-entry manifest:full-path="Pictures/1000000100000261000000C91A349311.png" manifest:media-type="image/png"/>
  <manifest:file-entry manifest:full-path="Pictures/1000000100000410000001A12A88BCA5.png" manifest:media-type="image/png"/>
  <manifest:file-entry manifest:full-path="Pictures/10000001000001C50000002C103A9B2D.png" manifest:media-type="image/png"/>
  <manifest:file-entry manifest:full-path="Pictures/1000000100000464000001ED3D35E47A.png" manifest:media-type="image/png"/>
  <manifest:file-entry manifest:full-path="Pictures/10000001000001EE00000047DFBC8E48.png" manifest:media-type="image/png"/>
  <manifest:file-entry manifest:full-path="Pictures/100000010000014000000083687A6F9B.png" manifest:media-type="image/png"/>
  <manifest:file-entry manifest:full-path="Pictures/10000001000002260000010344ECE804.png" manifest:media-type="image/png"/>
  <manifest:file-entry manifest:full-path="Pictures/10000001000003AB0000022ACEA4B05A.png" manifest:media-type="image/png"/>
  <manifest:file-entry manifest:full-path="Pictures/10000001000002060000009F85A7988E.png" manifest:media-type="image/png"/>
  <manifest:file-entry manifest:full-path="Pictures/100000010000024E000000824F6A75E9.png" manifest:media-type="image/png"/>
  <manifest:file-entry manifest:full-path="Pictures/10000001000003FB0000028FA87F3D1B.png" manifest:media-type="image/png"/>
  <manifest:file-entry manifest:full-path="Pictures/1000000100000226000000B7391E74F7.png" manifest:media-type="image/png"/>
  <manifest:file-entry manifest:full-path="Pictures/10000001000002A3000000346967C849.png" manifest:media-type="image/png"/>
  <manifest:file-entry manifest:full-path="Pictures/1000000100000240000002035C6AF27E.png" manifest:media-type="image/png"/>
  <manifest:file-entry manifest:full-path="Pictures/1000000100000332000000E6678E24D6.png" manifest:media-type="image/png"/>
  <manifest:file-entry manifest:full-path="Pictures/100000010000046400000179207F8773.png" manifest:media-type="image/png"/>
  <manifest:file-entry manifest:full-path="Pictures/10000001000001320000002344B7CE29.png" manifest:media-type="image/png"/>
  <manifest:file-entry manifest:full-path="Pictures/10000001000000F00000005E3ABEC230.png" manifest:media-type="image/png"/>
  <manifest:file-entry manifest:full-path="Pictures/10000001000000FD000000249A805D59.png" manifest:media-type="image/png"/>
  <manifest:file-entry manifest:full-path="Pictures/100000010000019E000000F8AF424049.png" manifest:media-type="image/png"/>
  <manifest:file-entry manifest:full-path="Pictures/100000010000018A0000003A554938A6.png" manifest:media-type="image/png"/>
  <manifest:file-entry manifest:full-path="Pictures/100000010000041B000000A60B7506E5.png" manifest:media-type="image/png"/>
  <manifest:file-entry manifest:full-path="Pictures/100000010000015E000000A646928A77.png" manifest:media-type="image/png"/>
  <manifest:file-entry manifest:full-path="Pictures/100000010000033A000001ACCEE27277.png" manifest:media-type="image/png"/>
  <manifest:file-entry manifest:full-path="Pictures/100000010000044D000000E4EF95BC5A.png" manifest:media-type="image/png"/>
  <manifest:file-entry manifest:full-path="Pictures/100000010000016C000000600B23E7F2.png" manifest:media-type="image/png"/>
  <manifest:file-entry manifest:full-path="Pictures/100000010000011A0000001950159B0D.png" manifest:media-type="image/png"/>
  <manifest:file-entry manifest:full-path="Pictures/10000001000001120000001BCAA774B4.png" manifest:media-type="image/png"/>
  <manifest:file-entry manifest:full-path="Pictures/1000000100000459000001029B6CE295.png" manifest:media-type="image/png"/>
  <manifest:file-entry manifest:full-path="Pictures/100000010000017400000100A8115216.png" manifest:media-type="image/png"/>
  <manifest:file-entry manifest:full-path="Pictures/10000001000002CA000000E7ACB31882.png" manifest:media-type="image/png"/>
  <manifest:file-entry manifest:full-path="Pictures/1000000100000466000001AA1E1D500C.png" manifest:media-type="image/png"/>
  <manifest:file-entry manifest:full-path="Pictures/1000000100000433000000A77ADEC367.png" manifest:media-type="image/png"/>
  <manifest:file-entry manifest:full-path="Pictures/10000001000001A500000023AEFA5BC7.png" manifest:media-type="image/png"/>
  <manifest:file-entry manifest:full-path="Pictures/100000010000028700000131740B1A17.png" manifest:media-type="image/png"/>
  <manifest:file-entry manifest:full-path="Pictures/10000001000002E90000009DBA8BDF64.png" manifest:media-type="image/png"/>
  <manifest:file-entry manifest:full-path="Pictures/10000001000004600000025AB4013864.png" manifest:media-type="image/png"/>
  <manifest:file-entry manifest:full-path="Pictures/100000010000045A000001EE74B718F1.png" manifest:media-type="image/png"/>
  <manifest:file-entry manifest:full-path="Pictures/10000001000004620000025DB8EB12A0.png" manifest:media-type="image/png"/>
  <manifest:file-entry manifest:full-path="Pictures/10000001000001030000002FFD5EEAF6.png" manifest:media-type="image/png"/>
  <manifest:file-entry manifest:full-path="Pictures/10000001000001820000002AF82425D4.png" manifest:media-type="image/png"/>
  <manifest:file-entry manifest:full-path="Pictures/10000001000002C8000000CDD2178F12.png" manifest:media-type="image/png"/>
  <manifest:file-entry manifest:full-path="Pictures/10000001000004300000020E682F9B59.png" manifest:media-type="image/png"/>
  <manifest:file-entry manifest:full-path="Pictures/100000010000040C000001B326D4DC9E.png" manifest:media-type="image/png"/>
  <manifest:file-entry manifest:full-path="Pictures/10000001000003E80000010C832E8E8D.png" manifest:media-type="image/png"/>
  <manifest:file-entry manifest:full-path="Pictures/100000010000036B000000CDB2989A8D.png" manifest:media-type="image/png"/>
  <manifest:file-entry manifest:full-path="Pictures/10000001000002110000009F036E48F0.png" manifest:media-type="image/png"/>
  <manifest:file-entry manifest:full-path="Pictures/1000000100000199000000FD74230C1E.png" manifest:media-type="image/png"/>
  <manifest:file-entry manifest:full-path="Pictures/10000001000001730000012ADB86B289.png" manifest:media-type="image/png"/>
  <manifest:file-entry manifest:full-path="Pictures/100000010000033E0000009519BF0C3C.png" manifest:media-type="image/png"/>
  <manifest:file-entry manifest:full-path="Pictures/1000000100000303000000F06E278963.png" manifest:media-type="image/png"/>
  <manifest:file-entry manifest:full-path="Pictures/100000010000010E0000002B4827CDBC.png" manifest:media-type="image/png"/>
  <manifest:file-entry manifest:full-path="Pictures/100000010000042C000000CBBAA9A44E.png" manifest:media-type="image/png"/>
  <manifest:file-entry manifest:full-path="Pictures/100000010000044D000000C83EFA0509.png" manifest:media-type="image/png"/>
  <manifest:file-entry manifest:full-path="Pictures/10000001000003F100000172E0F1E891.png" manifest:media-type="image/png"/>
  <manifest:file-entry manifest:full-path="Pictures/10000001000003750000018F7AF26454.png" manifest:media-type="image/png"/>
  <manifest:file-entry manifest:full-path="Pictures/10000001000002F80000009712D7EC24.png" manifest:media-type="image/png"/>
  <manifest:file-entry manifest:full-path="Pictures/10000001000003F30000005A9E250B26.png" manifest:media-type="image/png"/>
  <manifest:file-entry manifest:full-path="Pictures/1000000100000243000000AF1AC69EF9.png" manifest:media-type="image/png"/>
  <manifest:file-entry manifest:full-path="Pictures/10000001000003D4000000C84EB61E46.png" manifest:media-type="image/png"/>
  <manifest:file-entry manifest:full-path="Pictures/10000001000001DD000000CBFD77B326.png" manifest:media-type="image/png"/>
  <manifest:file-entry manifest:full-path="Pictures/10000001000000C60000002463AB9924.png" manifest:media-type="image/png"/>
  <manifest:file-entry manifest:full-path="Pictures/10000001000003FF000000B2E7DFCE48.png" manifest:media-type="image/png"/>
  <manifest:file-entry manifest:full-path="Pictures/1000000100000488000001FCE2CB4307.png" manifest:media-type="image/png"/>
  <manifest:file-entry manifest:full-path="Pictures/10000001000001220000002EE963697A.png" manifest:media-type="image/png"/>
  <manifest:file-entry manifest:full-path="Pictures/100000010000033E0000009F8B0468D1.png" manifest:media-type="image/png"/>
  <manifest:file-entry manifest:full-path="Pictures/1000000100000118000000326A560C55.png" manifest:media-type="image/png"/>
  <manifest:file-entry manifest:full-path="Pictures/100000010000018A000000864966A509.png" manifest:media-type="image/png"/>
  <manifest:file-entry manifest:full-path="Pictures/1000000100000318000000C65CB853B2.png" manifest:media-type="image/png"/>
  <manifest:file-entry manifest:full-path="Pictures/10000001000002AE000000C42027BC30.png" manifest:media-type="image/png"/>
  <manifest:file-entry manifest:full-path="Pictures/1000000100000428000000AAE089F7E5.png" manifest:media-type="image/png"/>
  <manifest:file-entry manifest:full-path="Pictures/10000001000003EF000000C1D8444B49.png" manifest:media-type="image/png"/>
  <manifest:file-entry manifest:full-path="Pictures/10000001000002810000006542BE6B4E.png" manifest:media-type="image/png"/>
  <manifest:file-entry manifest:full-path="Pictures/10000001000002DF00000110770658F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8pt" fo:language="bg" fo:country="BG" fo:font-weight="bold" officeooo:rsid="0011b570" officeooo:paragraph-rsid="0011b57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language="bg" fo:country="BG" fo:font-weight="bold" officeooo:rsid="0011b570" officeooo:paragraph-rsid="0011b57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language="bg" fo:country="BG" fo:font-weight="bold" officeooo:rsid="0011b570" officeooo:paragraph-rsid="0011b57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left" style:justify-single-word="false"/>
      <style:text-properties style:font-name="Arial1" fo:font-size="14pt" fo:language="bg" fo:country="BG" fo:font-weight="bold" officeooo:rsid="0011b570" officeooo:paragraph-rsid="0011b57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left" style:justify-single-word="false"/>
      <style:text-properties style:font-name="Arial1" fo:font-size="14pt" fo:language="en" fo:country="US" fo:font-weight="bold" officeooo:rsid="0011b570" officeooo:paragraph-rsid="0011b5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1b570" officeooo:paragraph-rsid="0011b57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left" style:justify-single-word="false"/>
      <style:text-properties style:font-name="Arial1" fo:font-size="14pt" fo:language="en" fo:country="US" fo:font-weight="normal" officeooo:rsid="0011b570" officeooo:paragraph-rsid="0011b57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26cba" officeooo:paragraph-rsid="0011b57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26cba" officeooo:paragraph-rsid="00126cb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3cf70" officeooo:paragraph-rsid="0013cf7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3eda6" officeooo:paragraph-rsid="0013eda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left" style:justify-single-word="false"/>
      <style:text-properties style:font-name="Arial1" fo:font-size="14pt" fo:language="bg" fo:country="BG" fo:font-weight="bold" officeooo:rsid="001445c9" officeooo:paragraph-rsid="001445c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left" style:justify-single-word="false"/>
      <style:text-properties style:font-name="Arial1" fo:font-size="14pt" fo:language="en" fo:country="US" fo:font-weight="bold" officeooo:rsid="001445c9" officeooo:paragraph-rsid="001445c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4e5c7" officeooo:paragraph-rsid="0014e5c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left" style:justify-single-word="false"/>
      <style:text-properties style:font-name="Arial1" fo:font-size="14pt" fo:language="en" fo:country="US" fo:font-weight="normal" officeooo:rsid="0014e5c7" officeooo:paragraph-rsid="0014e5c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67bbf" officeooo:paragraph-rsid="00167bb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67bbf" officeooo:paragraph-rsid="00167bb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bold" officeooo:rsid="00167bbf" officeooo:paragraph-rsid="00167bb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7f175" officeooo:paragraph-rsid="0017f17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7f175" officeooo:paragraph-rsid="0017f17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97278" officeooo:paragraph-rsid="0019727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97278" officeooo:paragraph-rsid="0019727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a29b2" officeooo:paragraph-rsid="0019727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b010e" officeooo:paragraph-rsid="001b010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b9bf3" officeooo:paragraph-rsid="001b9bf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1b9bf3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cc176" officeooo:paragraph-rsid="001b9bf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cc176" officeooo:paragraph-rsid="001cc17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cc2b4" officeooo:paragraph-rsid="001cc2b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cc2b4" officeooo:paragraph-rsid="001cc2b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ce553" officeooo:paragraph-rsid="001ce55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bold" officeooo:rsid="001ce553" officeooo:paragraph-rsid="001ce55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cfa33" officeooo:paragraph-rsid="001cfa3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cfa33" officeooo:paragraph-rsid="001cfa3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d9684" officeooo:paragraph-rsid="001d968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1d9684" officeooo:paragraph-rsid="001d9684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1d9684" officeooo:paragraph-rsid="001d9684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bold" officeooo:rsid="001dd31c" officeooo:paragraph-rsid="001dd31c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1f45d1" officeooo:paragraph-rsid="001f45d1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1f45d1" officeooo:paragraph-rsid="001f45d1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1479d" officeooo:paragraph-rsid="0021479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21479d" officeooo:paragraph-rsid="0021479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2c16e" officeooo:paragraph-rsid="0022c16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22c16e" officeooo:paragraph-rsid="0022c16e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bold" officeooo:rsid="00249169" officeooo:paragraph-rsid="00249169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49169" officeooo:paragraph-rsid="00249169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style:text-underline-style="solid" style:text-underline-width="auto" style:text-underline-color="font-color" fo:font-weight="normal" officeooo:rsid="00249169" officeooo:paragraph-rsid="00249169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5f3b2" officeooo:paragraph-rsid="0025f3b2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25f3b2" officeooo:paragraph-rsid="0025f3b2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 fo:break-before="page"/>
      <style:text-properties style:font-name="Arial1" fo:font-size="14pt" fo:language="bg" fo:country="BG" fo:font-style="normal" fo:font-weight="normal" officeooo:rsid="00261d86" officeooo:paragraph-rsid="00261d86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61d86" officeooo:paragraph-rsid="00261d86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 style:writing-mode="lr-tb" style:writing-mode-automatic="false"/>
      <style:text-properties style:font-name="Arial1" fo:font-size="14pt" fo:language="en" fo:country="US" fo:font-style="normal" style:text-underline-style="solid" style:text-underline-width="auto" style:text-underline-color="font-color" fo:font-weight="normal" officeooo:rsid="00275c99" officeooo:paragraph-rsid="00275c99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 style:writing-mode="lr-tb" style:writing-mode-automatic="false"/>
      <style:text-properties style:font-name="Arial1" fo:font-size="14pt" fo:language="bg" fo:country="BG" fo:font-style="normal" style:text-underline-style="none" fo:font-weight="normal" officeooo:rsid="00275c99" officeooo:paragraph-rsid="00275c99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49169" officeooo:paragraph-rsid="00275c99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75c99" officeooo:paragraph-rsid="00275c99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275c99" officeooo:paragraph-rsid="00275c99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96b04" officeooo:paragraph-rsid="00296b04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296b04" officeooo:paragraph-rsid="00296b04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bold" officeooo:rsid="00296b04" officeooo:paragraph-rsid="00296b04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bold" officeooo:rsid="00296b04" officeooo:paragraph-rsid="00296b04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style:text-underline-style="solid" style:text-underline-width="auto" style:text-underline-color="font-color" fo:font-weight="normal" officeooo:rsid="00296b04" officeooo:paragraph-rsid="00296b04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style:text-underline-style="none" fo:font-weight="normal" officeooo:rsid="00296b04" officeooo:paragraph-rsid="00296b04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style:text-underline-style="none" fo:font-weight="normal" officeooo:rsid="002a12b4" officeooo:paragraph-rsid="002a12b4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style:text-underline-style="none" fo:font-weight="normal" officeooo:rsid="002ba1cf" officeooo:paragraph-rsid="002ba1cf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style:font-name="Arial3" fo:font-size="14pt" fo:language="bg" fo:country="BG" fo:font-style="normal" style:text-underline-style="none" fo:font-weight="normal" officeooo:rsid="002ba1cf" officeooo:paragraph-rsid="002ba1cf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variant="normal" fo:text-transform="none" style:font-name="Arial3" fo:font-size="14pt" fo:language="bg" fo:country="BG" fo:font-style="normal" style:text-underline-style="none" fo:font-weight="normal" officeooo:rsid="002ba1cf" officeooo:paragraph-rsid="002ba1cf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style:font-name="Arial3" fo:font-size="14pt" fo:language="bg" fo:country="BG" fo:font-style="normal" fo:font-weight="normal" officeooo:rsid="002c3e1b" officeooo:paragraph-rsid="002c3e1b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font-name="Arial1" fo:font-size="14pt" fo:language="bg" fo:country="BG" fo:font-style="normal" fo:font-weight="normal" officeooo:rsid="00249169" officeooo:paragraph-rsid="002c3e1b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style:font-name="Arial1" fo:font-size="14pt" fo:language="bg" fo:country="BG" fo:font-style="normal" fo:font-weight="normal" officeooo:rsid="002c3e1b" officeooo:paragraph-rsid="002c3e1b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Arial1" fo:font-size="14pt" fo:language="en" fo:country="US" fo:font-style="normal" fo:font-weight="normal" officeooo:rsid="002db19a" officeooo:paragraph-rsid="002db19a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Arial1" fo:font-size="14pt" fo:language="bg" fo:country="BG" fo:font-style="normal" fo:font-weight="normal" officeooo:rsid="002db19a" officeooo:paragraph-rsid="002db19a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style:font-name="Arial1" fo:font-size="14pt" fo:language="en" fo:country="US" fo:font-style="normal" fo:font-weight="normal" officeooo:rsid="002c3e1b" officeooo:paragraph-rsid="002c3e1b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Arial1" fo:font-size="14pt" fo:language="en" fo:country="US" fo:font-style="normal" style:text-underline-style="solid" style:text-underline-width="auto" style:text-underline-color="font-color" fo:font-weight="normal" officeooo:rsid="002db19a" officeooo:paragraph-rsid="002db19a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Text_20_body">
      <style:paragraph-properties fo:text-align="justify" style:justify-single-word="false" style:writing-mode="lr-tb" style:writing-mode-automatic="false"/>
      <style:text-properties style:font-name="Arial1" fo:font-size="14pt" fo:language="en" fo:country="US" fo:font-style="normal" style:text-underline-style="solid" style:text-underline-width="auto" style:text-underline-color="font-color" fo:font-weight="normal" officeooo:rsid="002db19a" officeooo:paragraph-rsid="002db19a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Text_20_body">
      <style:paragraph-properties fo:text-align="justify" style:justify-single-word="false" style:writing-mode="lr-tb" style:writing-mode-automatic="false"/>
      <style:text-properties style:font-name="Arial1" fo:font-size="14pt" fo:language="bg" fo:country="BG" fo:font-style="normal" style:text-underline-style="none" fo:font-weight="normal" officeooo:rsid="002ebff3" officeooo:paragraph-rsid="002ebff3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Text_20_body">
      <style:paragraph-properties fo:text-align="justify" style:justify-single-word="false" style:writing-mode="lr-tb" style:writing-mode-automatic="false"/>
      <style:text-properties style:font-name="Arial1" fo:font-size="14pt" fo:language="bg" fo:country="BG" fo:font-style="normal" style:text-underline-style="solid" style:text-underline-width="auto" style:text-underline-color="font-color" fo:font-weight="normal" officeooo:rsid="002ebff3" officeooo:paragraph-rsid="002ebff3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Text_20_body">
      <style:paragraph-properties fo:text-align="justify" style:justify-single-word="false" style:writing-mode="lr-tb" style:writing-mode-automatic="false"/>
      <style:text-properties style:font-name="Arial1" fo:font-size="14pt" fo:language="en" fo:country="US" fo:font-style="normal" style:text-underline-style="none" fo:font-weight="normal" officeooo:rsid="002ebff3" officeooo:paragraph-rsid="002ebff3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49169" officeooo:paragraph-rsid="002ebff3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2ebff3" officeooo:paragraph-rsid="002ebff3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bold" officeooo:rsid="002ebff3" officeooo:paragraph-rsid="002ebff3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2ebff3" officeooo:paragraph-rsid="002ebff3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2f9adc" officeooo:paragraph-rsid="002f9ad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bg" fo:country="BG"/>
    </style:style>
    <style:style style:name="T3" style:family="text">
      <style:text-properties fo:language="bg" fo:country="BG" officeooo:rsid="00126cba"/>
    </style:style>
    <style:style style:name="T4" style:family="text">
      <style:text-properties officeooo:rsid="00167bbf"/>
    </style:style>
    <style:style style:name="T5" style:family="text">
      <style:text-properties fo:language="en" fo:country="US" officeooo:rsid="00167bbf"/>
    </style:style>
    <style:style style:name="T6" style:family="text">
      <style:text-properties officeooo:rsid="00197278"/>
    </style:style>
    <style:style style:name="T7" style:family="text">
      <style:text-properties fo:language="en" fo:country="US" officeooo:rsid="00197278"/>
    </style:style>
    <style:style style:name="T8" style:family="text">
      <style:text-properties fo:language="bg" fo:country="BG" officeooo:rsid="001a29b2"/>
    </style:style>
    <style:style style:name="T9" style:family="text">
      <style:text-properties officeooo:rsid="001a29b2"/>
    </style:style>
    <style:style style:name="T10" style:family="text">
      <style:text-properties style:font-name="Arial1" fo:font-size="14pt" fo:language="bg" fo:country="BG" fo:font-weight="normal" officeooo:rsid="001b9bf3" style:font-size-asian="14pt" style:font-weight-asian="normal" style:font-size-complex="14pt" style:font-weight-complex="normal"/>
    </style:style>
    <style:style style:name="T11" style:family="text">
      <style:text-properties style:font-name="Arial1" fo:font-size="14pt" fo:language="en" fo:country="US" fo:font-weight="normal" officeooo:rsid="001b9bf3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loext:opacity="100%" fo:font-family="'Google Sans', Arial, sans-serif" fo:font-size="15pt" fo:letter-spacing="normal" fo:language="bg" fo:country="BG" fo:font-style="normal" fo:font-weight="normal" officeooo:rsid="001b9bf3" style:font-size-asian="14pt" style:font-weight-asian="normal" style:font-size-complex="14pt" style:font-weight-complex="normal" loext:padding="0in" loext:border="none"/>
    </style:style>
    <style:style style:name="T13" style:family="text">
      <style:text-properties style:font-name="Arial1" fo:font-size="14pt" fo:language="bg" fo:country="BG" fo:font-weight="normal" officeooo:rsid="001cc176" style:font-size-asian="14pt" style:font-weight-asian="normal" style:font-size-complex="14pt" style:font-weight-complex="normal"/>
    </style:style>
    <style:style style:name="T14" style:family="text">
      <style:text-properties style:font-name="Arial1" fo:font-size="14pt" fo:language="en" fo:country="US" fo:font-weight="normal" officeooo:rsid="001cc176" style:font-size-asian="14pt" style:font-weight-asian="normal" style:font-size-complex="14pt" style:font-weight-complex="normal"/>
    </style:style>
    <style:style style:name="T15" style:family="text">
      <style:text-properties fo:language="en" fo:country="US" officeooo:rsid="00231cba"/>
    </style:style>
    <style:style style:name="T16" style:family="text">
      <style:text-properties officeooo:rsid="00231cba"/>
    </style:style>
    <style:style style:name="T17" style:family="text">
      <style:text-properties officeooo:rsid="00278ef5"/>
    </style:style>
    <style:style style:name="T18" style:family="text">
      <style:text-properties fo:language="en" fo:country="US" officeooo:rsid="00278ef5"/>
    </style:style>
    <style:style style:name="T19" style:family="text">
      <style:text-properties fo:font-variant="normal" fo:text-transform="none"/>
    </style:style>
    <style:style style:name="T20" style:family="text">
      <style:text-properties fo:font-variant="normal" fo:text-transform="none" fo:language="en" fo:country="US"/>
    </style:style>
    <style:style style:name="T21" style:family="text">
      <style:text-properties fo:font-variant="normal" fo:text-transform="none" style:text-underline-style="none"/>
    </style:style>
    <style:style style:name="T22" style:family="text">
      <style:text-properties fo:font-variant="normal" fo:text-transform="none" fo:language="en" fo:country="US" style:text-underline-style="none"/>
    </style:style>
    <style:style style:name="T23" style:family="text">
      <style:text-properties style:font-name="Arial1" officeooo:rsid="00249169"/>
    </style:style>
    <style:style style:name="T24" style:family="text">
      <style:text-properties style:font-name="Arial1" fo:language="en" fo:country="US" officeooo:rsid="002491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 проект по предмета „<text:span text:style-name="T1">Операционни системи“</text:span></text:p>
      <text:p text:style-name="P2">на Мартин Михалков</text:p>
      <text:p text:style-name="P3"/>
      <text:p text:style-name="P3">Вариант: „7 задачи“</text:p>
      <text:p text:style-name="P3"/>
      <text:p text:style-name="P4">Задача 1: <text:span text:style-name="T1">hexdump</text:span></text:p>
      <text:p text:style-name="P5"/>
      <text:p text:style-name="P6">Използвани библиотеки:</text:p>
      <text:p text:style-name="P5"/>
      <text:p text:style-name="P4"/>
      <text:p text:style-name="P6"><draw:frame draw:style-name="fr1" draw:name="Image1" text:anchor-type="char" svg:width="6.9252in" svg:height="0.6673in" draw:z-index="0"><draw:image xlink:href="Pictures/10000001000004600000006C03B77FCB.png" xlink:type="simple" xlink:show="embed" xlink:actuate="onLoad" draw:mime-type="image/png"/></draw:frame>Функция, която принтира съобщение на екрана, като автоматично намира дължината на подадения <text:span text:style-name="T1">string.</text:span></text:p>
      <text:p text:style-name="P6"><draw:frame draw:style-name="fr1" draw:name="Image2" text:anchor-type="char" svg:width="6.9252in" svg:height="0.8744in" draw:z-index="1"><draw:image xlink:href="Pictures/10000001000004540000008C47EA4463.png" xlink:type="simple" xlink:show="embed" xlink:actuate="onLoad" draw:mime-type="image/png"/></draw:frame>Използвани променливи:</text:p>
      <text:p text:style-name="P6">- <text:span text:style-name="T1">fd – </text:span>файлов дескриптор на отворения файл.</text:p>
      <text:p text:style-name="P6">- <text:span text:style-name="T1">bytes_read – </text:span>брой байтове от 0 до <text:span text:style-name="T1">BUFFER_SIZE, </text:span>които остават за текущия буфер <text:span text:style-name="T1">(</text:span>текущия ред<text:span text:style-name="T1">).</text:span></text:p>
      <text:p text:style-name="P7">- buf[] - <text:span text:style-name="T2">стринг, съдържащ </text:span><text:span text:style-name="T3">текущия буфер.</text:span></text:p>
      <text:p text:style-name="P8">- <text:span text:style-name="T1">hex_chars – </text:span>използван за преобразуването, в шестнадесетичен формат.</text:p>
      <text:p text:style-name="P6"/>
      <text:p text:style-name="P9"><draw:frame draw:style-name="fr1" draw:name="Image3" text:anchor-type="char" svg:width="6.9252in" svg:height="0.961in" draw:z-index="2"><draw:image xlink:href="Pictures/1000000100000480000000A023AA4382.png" xlink:type="simple" xlink:show="embed" xlink:actuate="onLoad" draw:mime-type="image/png"/></draw:frame></text:p>
      <text:p text:style-name="P9"/>
      <text:p text:style-name="P9"/>
      <text:p text:style-name="P9"><draw:frame draw:style-name="fr1" draw:name="Image4" text:anchor-type="char" svg:width="6.9252in" svg:height="1.9874in" draw:z-index="3"><draw:image xlink:href="Pictures/10000001000004570000013F9B69A41D.png" xlink:type="simple" xlink:show="embed" xlink:actuate="onLoad" draw:mime-type="image/png"/></draw:frame><text:soft-page-break/>Проверява дали точно един параметър е наличен <text:span text:style-name="T1">(</text:span>първият елемент в<text:span text:style-name="T1"> argc </text:span>е пътя до изпълнимия файл<text:span text:style-name="T1">)</text:span></text:p>
      <text:p text:style-name="P9">Отваря файла само за четене.</text:p>
      <text:p text:style-name="P9"><draw:frame draw:style-name="fr1" draw:name="Image5" text:anchor-type="char" svg:width="6.9252in" svg:height="0.6909in" draw:z-index="4"><draw:image xlink:href="Pictures/10000001000004260000006A7798D147.png" xlink:type="simple" xlink:show="embed" xlink:actuate="onLoad" draw:mime-type="image/png"/></draw:frame>Цикъла се повтаря докъто има поне един байт, останал за четене.</text:p>
      <text:p text:style-name="P9"/>
      <text:p text:style-name="P10"><draw:frame draw:style-name="fr2" draw:name="Image6" text:anchor-type="char" svg:width="6.7717in" svg:height="2.552in" draw:z-index="5"><draw:image xlink:href="Pictures/100000010000028A000000F5D6D6E43E.png" xlink:type="simple" xlink:show="embed" xlink:actuate="onLoad" draw:mime-type="image/png"/></draw:frame>За всеки цикъл на <text:span text:style-name="T1">while, for </text:span>цикъла се изпълнява за всички битове в буфера. <text:span text:style-name="T1">bytes_read </text:span>запазва броят на байтовете в текущия буфер.<text:span text:style-name="T1"> bytes_read</text:span> е или колкото<text:span text:style-name="T1"> BUFFER_SIZE,</text:span> или по-малко. Ако в текущия буфер все още има байтове за печатана, те се превръщат в шестнадесетичен формат в <text:span text:style-name="T1">if </text:span>оператора<text:span text:style-name="T1">. </text:span>Накрай принтираме преобразувания байт на стандартния изход <text:span text:style-name="T1">(</text:span>фаилов дескриптор <text:span text:style-name="T1">1).</text:span></text:p>
      <text:p text:style-name="P10"/>
      <text:p text:style-name="P10">Ако наличният брой байтове е по-малък от буфера, замествамете всеки байт с „ <text:s/>„.</text:p>
      <text:p text:style-name="P10"/>
      <text:p text:style-name="P11"><draw:frame draw:style-name="fr3" draw:name="Image7" text:anchor-type="char" svg:width="6.9252in" svg:height="1.9138in" draw:z-index="6"><draw:image xlink:href="Pictures/100000010000042B0000012738DD8E0C.png" xlink:type="simple" xlink:show="embed" xlink:actuate="onLoad" draw:mime-type="image/png"/></draw:frame><text:soft-page-break/>След принтирането на шестнадесетичния формат на даден байт, определяме, дали да принтираме „ <text:s/>“ или „ “, в зависимост дали текущо принтираният байт е осмия <text:span text:style-name="T1">(</text:span>с индекс <text:span text:style-name="T1">7) </text:span>или не, съответно<text:span text:style-name="T1">.</text:span></text:p>
      <text:p text:style-name="P11"/>
      <text:p text:style-name="P11"><draw:frame draw:style-name="fr4" draw:name="Image8" text:anchor-type="char" svg:x="0.8374in" svg:y="0in" svg:width="5.2508in" svg:height="0.9689in" draw:z-index="7"><draw:image xlink:href="Pictures/10000001000001F80000005D61742D1D.png" xlink:type="simple" xlink:show="embed" xlink:actuate="onLoad" draw:mime-type="image/png"/></draw:frame></text:p>
      <text:p text:style-name="P11"/>
      <text:p text:style-name="P11">Отделя шестнадесетичното представяне с <text:span text:style-name="T1">ASCII </text:span>представянето на битовете принтирайки „ <text:s text:c="2"/>„.</text:p>
      <text:p text:style-name="P11"/>
      <text:p text:style-name="P11"><draw:frame draw:style-name="fr3" draw:name="Image9" text:anchor-type="char" svg:width="6.9252in" svg:height="2.7756in" draw:z-index="8"><draw:image xlink:href="Pictures/1000000100000410000001A12A88BCA5.png" xlink:type="simple" xlink:show="embed" xlink:actuate="onLoad" draw:mime-type="image/png"/></draw:frame>ояа</text:p>
      <text:p text:style-name="P11">За всеки байт от текущия буфер или принтира <text:span text:style-name="T1">ASCII </text:span>формата на байта<text:span text:style-name="T1">, </text:span>или принтира „.“<text:span text:style-name="T1">, </text:span>ако няма повече байтове в текущия буфер<text:span text:style-name="T1">. </text:span>За байтовете, които трабва да бъдат принтирани, <text:span text:style-name="T1">C </text:span>проверява дали те могат да бъдат представени като символи <text:span text:style-name="T1">(</text:span>ако имат код между 32 и <text:span text:style-name="T1">127) </text:span>или не, и ако не, програмата замества байта с „.“<text:span text:style-name="T1">.</text:span></text:p>
      <text:p text:style-name="P11"><draw:frame draw:style-name="fr1" draw:name="Image10" text:anchor-type="char" svg:width="6.9252in" svg:height="0.3791in" draw:z-index="9"><draw:image xlink:href="Pictures/10000001000002FE0000002ABD69A71A.png" xlink:type="simple" xlink:show="embed" xlink:actuate="onLoad" draw:mime-type="image/png"/></draw:frame>Накрая на всяка итерация на <text:span text:style-name="T1">while(), </text:span>се принтира нов ред.</text:p>
      <text:p text:style-name="P11"/>
      <text:p text:style-name="P11"><draw:frame draw:style-name="fr4" draw:name="Image11" text:anchor-type="char" svg:x="0.0102in" svg:y="0.0575in" svg:width="4.7193in" svg:height="0.4583in" draw:z-index="10"><draw:image xlink:href="Pictures/10000001000001C50000002C103A9B2D.png" xlink:type="simple" xlink:show="embed" xlink:actuate="onLoad" draw:mime-type="image/png"/></draw:frame><text:soft-page-break/></text:p>
      <text:p text:style-name="P11"/>
      <text:p text:style-name="P11"/>
      <text:p text:style-name="P11">Затваря се отворения файл.</text:p>
      <text:p text:style-name="P11"/>
      <text:p text:style-name="P12">Задача 2: <text:span text:style-name="T1">reverse</text:span></text:p>
      <text:p text:style-name="P13"/>
      <text:p text:style-name="P14"><draw:frame draw:style-name="fr2" draw:name="Image12" text:anchor-type="char" svg:width="3.3335in" svg:height="1.3646in" draw:z-index="11"><draw:image xlink:href="Pictures/100000010000014000000083687A6F9B.png" xlink:type="simple" xlink:show="embed" xlink:actuate="onLoad" draw:mime-type="image/png"/></draw:frame>Използвани библиотеки и задаване на размер на буфера.</text:p>
      <text:p text:style-name="P14"/>
      <text:p text:style-name="P14"/>
      <text:p text:style-name="P14"/>
      <text:p text:style-name="P14"/>
      <text:p text:style-name="P14"><draw:frame draw:style-name="fr2" draw:name="Image13" text:anchor-type="char" svg:width="5.7299in" svg:height="2.698in" draw:z-index="12"><draw:image xlink:href="Pictures/10000001000002260000010344ECE804.png" xlink:type="simple" xlink:show="embed" xlink:actuate="onLoad" draw:mime-type="image/png"/></draw:frame>Проверява се дали е подаден точно един параметър. Отваря файла подаден като аргумент в режим на четене и писане и връща грешка ако не може да се оправи.</text:p>
      <text:p text:style-name="P14"><draw:frame draw:style-name="fr2" draw:name="Image14" text:anchor-type="char" svg:width="5.3965in" svg:height="1.6563in" draw:z-index="13"><draw:image xlink:href="Pictures/10000001000002060000009F85A7988E.png" xlink:type="simple" xlink:show="embed" xlink:actuate="onLoad" draw:mime-type="image/png"/></draw:frame>Намираме размера на файла, чрез използване на <text:span text:style-name="T1">lseek, </text:span>която връща позицията на курсора след преместването. <text:span text:style-name="T1">Lseek </text:span>в случай премества курсора на текущия файл дескриптор в края на файла.</text:p>
      <text:p text:style-name="P14"/>
      <text:p text:style-name="P14"><draw:frame draw:style-name="fr2" draw:name="Image15" text:anchor-type="char" svg:width="6.1465in" svg:height="1.3543in" draw:z-index="14"><draw:image xlink:href="Pictures/100000010000024E000000824F6A75E9.png" xlink:type="simple" xlink:show="embed" xlink:actuate="onLoad" draw:mime-type="image/png"/></draw:frame><draw:frame draw:style-name="fr4" draw:name="Image16" text:anchor-type="char" svg:x="-1.4583in" svg:y="0.8909in" svg:width="6.9252in" svg:height="0.5335in" draw:z-index="15"><draw:image xlink:href="Pictures/10000001000002A3000000346967C849.png" xlink:type="simple" xlink:show="embed" xlink:actuate="onLoad" draw:mime-type="image/png"/></draw:frame><text:soft-page-break/>Създавам масив, който да запазва буфера, <text:span text:style-name="T1">left </text:span>и <text:span text:style-name="T1">right </text:span>запазващи индекса на първия и последния блок.</text:p>
      <text:p text:style-name="P14">Цикъла прави итерации докъто индекса на <text:span text:style-name="T1">left </text:span>и индекса на <text:span text:style-name="T1">right </text:span>не се срещнат<text:span text:style-name="T1">.</text:span></text:p>
      <text:p text:style-name="P15"/>
      <text:p text:style-name="P14"><draw:frame draw:style-name="fr2" draw:name="Image17" text:anchor-type="char" svg:width="4.8516in" svg:height="4.3374in" draw:z-index="16"><draw:image xlink:href="Pictures/1000000100000240000002035C6AF27E.png" xlink:type="simple" xlink:show="embed" xlink:actuate="onLoad" draw:mime-type="image/png"/></draw:frame>За всяка итерация на цикъла създаваме две променливи, които съдържат байта определен от индексите на <text:span text:style-name="T1">left </text:span>и <text:span text:style-name="T1">right </text:span>съответно<text:span text:style-name="T1">. </text:span><text:span text:style-name="T4">Пълвият </text:span><text:span text:style-name="T5">lseek </text:span><text:span text:style-name="T4">премества курсора до позицията на </text:span><text:span text:style-name="T5">left </text:span><text:span text:style-name="T4">и запазва байта в </text:span><text:span text:style-name="T5">left_char.</text:span></text:p>
      <text:p text:style-name="P16">Вторият <text:span text:style-name="T1">lseek </text:span>премества курсора до позицията на <text:span text:style-name="T1">right </text:span>и запазва байта в <text:span text:style-name="T1">right_char.</text:span></text:p>
      <text:p text:style-name="P17">Третият <text:span text:style-name="T1">lseek </text:span>премества отново курсора на позицията на <text:span text:style-name="T1">left, </text:span>но този път презаписва байта с байта записан в <text:span text:style-name="T1">right_char.</text:span></text:p>
      <text:p text:style-name="P17">Четвъртият <text:span text:style-name="T1">lseek </text:span>премества курсора на позицията на <text:span text:style-name="T1">right </text:span>и презаписва байта с байта записан в <text:span text:style-name="T1">left_char.</text:span></text:p>
      <text:p text:style-name="P17">Накрая <text:span text:style-name="T1">left </text:span>и <text:span text:style-name="T1">right </text:span>се преместват навътре.</text:p>
      <text:p text:style-name="P17"/>
      <text:p text:style-name="P17"><draw:frame draw:style-name="fr4" draw:name="Image18" text:anchor-type="char" svg:x="-0.0063in" svg:y="-0.1866in" svg:width="3.1874in" svg:height="0.3646in" draw:z-index="17"><draw:image xlink:href="Pictures/10000001000001320000002344B7CE29.png" xlink:type="simple" xlink:show="embed" xlink:actuate="onLoad" draw:mime-type="image/png"/></draw:frame><text:soft-page-break/></text:p>
      <text:p text:style-name="P17">Затвяряне на файла.</text:p>
      <text:p text:style-name="P17"/>
      <text:p text:style-name="P18">Задача 3: <text:span text:style-name="T1">prun</text:span></text:p>
      <text:p text:style-name="P17"/>
      <text:p text:style-name="P17"><draw:frame draw:style-name="fr5" draw:name="Image19" text:anchor-type="char" svg:width="2.5209in" svg:height="1.3543in" draw:z-index="18"><draw:image xlink:href="Pictures/10000001000000F200000082F50B02C9.png" xlink:type="simple" xlink:show="embed" xlink:actuate="onLoad" draw:mime-type="image/png"/></draw:frame>Използвани библиотеки.</text:p>
      <text:p text:style-name="P17"/>
      <text:p text:style-name="P17"/>
      <text:p text:style-name="P17"/>
      <text:p text:style-name="P17"/>
      <text:p text:style-name="P17"/>
      <text:p text:style-name="P17"/>
      <text:p text:style-name="P19"><draw:frame draw:style-name="fr4" draw:name="Image20" text:anchor-type="char" svg:x="0.0264in" svg:y="0.0728in" svg:width="2.6354in" svg:height="0.3752in" draw:z-index="19"><draw:image xlink:href="Pictures/10000001000000FD000000249A805D59.png" xlink:type="simple" xlink:show="embed" xlink:actuate="onLoad" draw:mime-type="image/png"/></draw:frame></text:p>
      <text:p text:style-name="P19"/>
      <text:p text:style-name="P19"/>
      <text:p text:style-name="P19">Проверява дали имо поне един подаден параметър.</text:p>
      <text:p text:style-name="P19"/>
      <text:p text:style-name="P19"><draw:frame draw:style-name="fr4" draw:name="Image21" text:anchor-type="char" svg:x="0.0264in" svg:y="0.1264in" svg:width="5.1465in" svg:height="0.7398in" draw:z-index="20"><draw:image xlink:href="Pictures/10000001000001EE00000047DFBC8E48.png" xlink:type="simple" xlink:show="embed" xlink:actuate="onLoad" draw:mime-type="image/png"/></draw:frame></text:p>
      <text:p text:style-name="P19"/>
      <text:p text:style-name="P19"/>
      <text:p text:style-name="P19"/>
      <text:p text:style-name="P19">Запазва броя на подадените параметри в <text:span text:style-name="T1">num_cmds </text:span>и заделя динамично памет за <text:span text:style-name="T1">PID-</text:span>тата на всички процеси, които ще бъдат създадени <text:span text:style-name="T1">(</text:span>по един процес за всеки подаден параметър<text:span text:style-name="T1">).</text:span></text:p>
      <text:p text:style-name="P20"/>
      <text:p text:style-name="P19"><draw:frame draw:style-name="fr4" draw:name="Image22" text:anchor-type="char" svg:x="0.0118in" svg:y="0.0673in" svg:width="4.1047in" svg:height="0.6043in" draw:z-index="21"><draw:image xlink:href="Pictures/100000010000018A0000003A554938A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>Цикъла се изпълнява за всеки процес.</text:p>
      <text:p text:style-name="P19"/>
      <text:p text:style-name="P20"><draw:frame draw:style-name="fr4" draw:name="Image23" text:anchor-type="char" svg:x="0.039in" svg:y="0.5626in" svg:width="3.6457in" svg:height="1.7291in" draw:z-index="22"><draw:image xlink:href="Pictures/100000010000015E000000A646928A77.png" xlink:type="simple" xlink:show="embed" xlink:actuate="onLoad" draw:mime-type="image/png"/></draw:frame>Fork() <text:span text:style-name="T2">връща </text:span>PID-<text:span text:style-name="T2">то на дъщерния процес който е създал. Ако </text:span>fork() <text:span text:style-name="T2">върне число &lt; </text:span>0<text:span text:style-name="T2">, значи има грешка при създаването на процеса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draw:frame draw:style-name="fr1" draw:name="Image24" text:anchor-type="char" svg:width="6.9252in" svg:height="3.5874in" draw:z-index="23"><draw:image xlink:href="Pictures/100000010000033A000001ACCEE27277.png" xlink:type="simple" xlink:show="embed" xlink:actuate="onLoad" draw:mime-type="image/png"/></draw:frame>Кода в <text:span text:style-name="T1">if </text:span>оператора се изпълнява само на дъщерния процес. Бащерният го пропуска.</text:p>
      <text:p text:style-name="P19">Отваря се файла „/<text:span text:style-name="T1">dev/null” </text:span>към който пренасочваме стандартния изход, така, че изхода от подадените команди да не се принтира. След това <text:span text:style-name="T6">затваряме „</text:span><text:span text:style-name="T7">/dev/null”.</text:span></text:p>
      <text:p text:style-name="P21">След това съставяме <text:span text:style-name="T1">args, </text:span>който представлява команда, изпълняваща подадената команда в /<text:span text:style-name="T1">bin/sh.</text:span></text:p>
      <text:p text:style-name="P22">I execvp <text:span text:style-name="T2">презаписваме програмата на дъщерния процес, </text:span><text:span text:style-name="T8">с командата, която искаме да изпълним. Подадени са два параметъра на </text:span><text:span text:style-name="T9">execvp</text:span><text:span text:style-name="T8">: първо подаваме командата извъкваща „/</text:span><text:span text:style-name="T9">bin/sh</text:span><text:span text:style-name="T8">“ и после на нея подаваме останалите параметри.</text:span></text:p>
      <text:p text:style-name="P23"/>
      <text:p text:style-name="P24"><draw:frame draw:style-name="fr4" draw:name="Image25" text:anchor-type="char" svg:x="0.0071in" svg:y="0.1874in" svg:width="2.9374in" svg:height="0.2602in" draw:z-index="24"><draw:image xlink:href="Pictures/100000010000011A0000001950159B0D.png" xlink:type="simple" xlink:show="embed" xlink:actuate="onLoad" draw:mime-type="image/png"/></draw:frame></text:p>
      <text:p text:style-name="P24"/>
      <text:p text:style-name="P24"/>
      <text:p text:style-name="P24">Създаваме променлива, която следи процесите, които все още не са завършили. Отначало се приема, че никои процес не е завършил.</text:p>
      <text:p text:style-name="P24"><draw:frame draw:style-name="fr4" draw:name="Image26" text:anchor-type="char" svg:x="0.0283in" svg:y="0.1453in" svg:width="2.8543in" svg:height="0.2811in" draw:z-index="25"><draw:image xlink:href="Pictures/10000001000001120000001BCAA774B4.png" xlink:type="simple" xlink:show="embed" xlink:actuate="onLoad" draw:mime-type="image/png"/></draw:frame></text:p>
      <text:p text:style-name="P24"/>
      <text:p text:style-name="P25">Цикъла се повтаря докъто има все още изпълняващи се процеси.</text:p>
      <text:p text:style-name="P26"><draw:frame draw:style-name="fr3" draw:name="Image27" text:anchor-type="char" svg:width="6.9252in" svg:height="1.6047in" draw:z-index="26"><draw:image xlink:href="Pictures/1000000100000459000001029B6CE295.png" xlink:type="simple" xlink:show="embed" xlink:actuate="onLoad" draw:mime-type="image/png"/></draw:frame><text:soft-page-break/><text:span text:style-name="T10">Създава променлива </text:span><text:span text:style-name="T11">status, </text:span><text:span text:style-name="T10">която съдържа изходната информация от </text:span><text:span text:style-name="T11">waitpid, </text:span><text:span text:style-name="T10">кайто изчиства дъщерните процеси, така, че да не станат „зомби“ процеси </text:span><text:span text:style-name="T11">(</text:span><text:span text:style-name="T12">процеси, които са приключили, но все още са в таблицата с процеси</text:span><text:span text:style-name="T11">)</text:span><text:span text:style-name="T10">. </text:span><text:span text:style-name="T13">„-</text:span><text:span text:style-name="T14">1</text:span><text:span text:style-name="T13">“, означава, че функцията ще работи за всеки процес и записва изходния код в </text:span><text:span text:style-name="T14">status. </text:span><text:span text:style-name="T13">„</text:span><text:span text:style-name="T14">0</text:span><text:span text:style-name="T13">“, означава, че се използват настройките по подразбиране. </text:span><text:span text:style-name="T14">Waitpid </text:span><text:span text:style-name="T13">връща или -</text:span><text:span text:style-name="T14">1 (</text:span><text:span text:style-name="T13">грешка</text:span><text:span text:style-name="T14">), </text:span><text:span text:style-name="T13">или 0 </text:span><text:span text:style-name="T14">(</text:span><text:span text:style-name="T13">процеса не си е сменил състоянието; при променяне на настройките</text:span><text:span text:style-name="T14">), </text:span><text:span text:style-name="T13">или &gt;</text:span><text:span text:style-name="T14">0 (PID-</text:span><text:span text:style-name="T13">то на дъщерния процес, чието състояние се е променило.</text:span><text:span text:style-name="T14">)</text:span></text:p>
      <text:p text:style-name="P27"/>
      <text:p text:style-name="P28">Проверява се дали има грешка при изпълнението.</text:p>
      <text:p text:style-name="P28"/>
      <text:p text:style-name="P29"><draw:frame draw:style-name="fr1" draw:name="Image28" text:anchor-type="char" svg:width="6.9252in" svg:height="2.6193in" draw:z-index="27"><draw:image xlink:href="Pictures/1000000100000466000001AA1E1D500C.png" xlink:type="simple" xlink:show="embed" xlink:actuate="onLoad" draw:mime-type="image/png"/></draw:frame>Цикъл, който намира кой индекс от масива <text:span text:style-name="T1">pids </text:span>е равен на <text:span text:style-name="T1">PID-</text:span>то на завършения процес.</text:p>
      <text:p text:style-name="P30">exit_code <text:span text:style-name="T2">съдържа или изходния код, ако процеса е завършил успешно, или сигнала, който го е терминирал, ако процеса не е завършил успешно.</text:span></text:p>
      <text:p text:style-name="P29"/>
      <text:p text:style-name="P31">Принтира се <text:span text:style-name="T1">PID-</text:span>то<text:span text:style-name="T1">, </text:span>командата и изходния код на процеса<text:span text:style-name="T1">.</text:span></text:p>
      <text:p text:style-name="P31">Задава <text:span text:style-name="T1">PID-</text:span>то на текущия процес да е равно на „-1“ в <text:span text:style-name="T1">pids.</text:span></text:p>
      <text:p text:style-name="P31">Намаляваме <text:span text:style-name="T1">remaining </text:span>с 1. Използваме <text:span text:style-name="T1">break; </text:span>за да прекъснем цикъла, защото вече сме намерили процеса, който търсим.</text:p>
      <text:p text:style-name="P31"/>
      <text:p text:style-name="P31"/>
      <text:p text:style-name="P31"/>
      <text:p text:style-name="P31"><draw:frame draw:style-name="fr4" draw:name="Image29" text:anchor-type="char" svg:x="0.0319in" svg:y="0.0173in" svg:width="4.3862in" svg:height="0.3646in" draw:z-index="28"><draw:image xlink:href="Pictures/10000001000001A500000023AEFA5BC7.png" xlink:type="simple" xlink:show="embed" xlink:actuate="onLoad" draw:mime-type="image/png"/></draw:frame><text:soft-page-break/></text:p>
      <text:p text:style-name="P31"/>
      <text:p text:style-name="P31">Освобождава се алокираното място.</text:p>
      <text:p text:style-name="P31"/>
      <text:p text:style-name="P32">Задача 4: <text:span text:style-name="T1">pipe2</text:span></text:p>
      <text:p text:style-name="P31">Използвани библиотеки.</text:p>
      <text:p text:style-name="P31"/>
      <text:p text:style-name="P31"/>
      <text:p text:style-name="P31"/>
      <text:p text:style-name="P31"><draw:frame draw:style-name="fr1" draw:name="Image30" text:anchor-type="char" svg:width="6.9252in" svg:height="1.0929in" draw:z-index="29"><draw:image xlink:href="Pictures/100000010000041B000000A60B7506E5.png" xlink:type="simple" xlink:show="embed" xlink:actuate="onLoad" draw:mime-type="image/png"/></draw:frame><draw:frame draw:style-name="fr4" draw:name="Image31" text:anchor-type="char" svg:x="-0.0228in" svg:y="1.75in" svg:width="6.7402in" svg:height="3.1772in" draw:z-index="30"><draw:image xlink:href="Pictures/100000010000028700000131740B1A17.png" xlink:type="simple" xlink:show="embed" xlink:actuate="onLoad" draw:mime-type="image/png"/></draw:frame></text:p>
      <text:p text:style-name="P31"/>
      <text:p text:style-name="P31">Проверява дали са подадени точно два параметъра и създава два масива, които съдържата двата параметъра.</text:p>
      <text:p text:style-name="P31"/>
      <text:p text:style-name="P31"><draw:frame draw:style-name="fr3" draw:name="Image32" text:anchor-type="char" svg:width="6.9252in" svg:height="3.0366in" draw:z-index="31"><draw:image xlink:href="Pictures/1000000100000464000001ED3D35E47A.png" xlink:type="simple" xlink:show="embed" xlink:actuate="onLoad" draw:mime-type="image/png"/></draw:frame><text:soft-page-break/>Създава се масив от тип <text:span text:style-name="T1">int, </text:span>който съдържа файловите дескриптори на двата края на анонимна тръба. Проверява дали тръбата е създадена успешно.</text:p>
      <text:p text:style-name="P33"><draw:frame draw:style-name="fr2" draw:name="Image33" text:anchor-type="char" svg:width="6.3445in" svg:height="2.0937in" draw:z-index="32"><draw:image xlink:href="Pictures/1000000100000261000000C91A349311.png" xlink:type="simple" xlink:show="embed" xlink:actuate="onLoad" draw:mime-type="image/png"/></draw:frame>Клонира текущия процес и създава нов дъщерен процес. Проверява дали е създаден успешно.</text:p>
      <text:p text:style-name="P33"/>
      <text:p text:style-name="P33"><draw:frame draw:style-name="fr1" draw:name="Image34" text:anchor-type="char" svg:width="6.9252in" svg:height="3.7217in" draw:z-index="33"><draw:image xlink:href="Pictures/10000001000004600000025AB4013864.png" xlink:type="simple" xlink:show="embed" xlink:actuate="onLoad" draw:mime-type="image/png"/></draw:frame><text:soft-page-break/>Кода в този <text:span text:style-name="T1">if </text:span>оператор се изпълнява само от първия дъщерен процес.</text:p>
      <text:p text:style-name="P33">Клонира се стандартния изход в записващия край на тръбата. След това тръбата се затваря за първия процес. ТОВА, ЧЕ Е ЗАТВОРЕНА ТРЪБАТА ЗА ПЪРВИЯ ПРОЦЕС, НЕ ЗНАЧИ, ЧЕ Е ЗАТВОРЕНА ЗА ВТОРИЯ ПРОЦЕС.</text:p>
      <text:p text:style-name="P33"/>
      <text:p text:style-name="P33">След това се създава масив, който съдържа командата, която ще презапише процеса. С <text:span text:style-name="T1">execvp </text:span>стартираме „/<text:span text:style-name="T1">bin/sh</text:span>“ и му подаваме следващите аргументи. Ако има грешка с промяната на програмата в процеса, <text:span text:style-name="T1">C </text:span>ще стигне до <text:span text:style-name="T1">perror </text:span>и ще изведе грешка и ще върне код „<text:span text:style-name="T1">1”.</text:span></text:p>
      <text:p text:style-name="P34"/>
      <text:p text:style-name="P33"><draw:frame draw:style-name="fr2" draw:name="Image35" text:anchor-type="char" svg:width="5.7299in" svg:height="1.9063in" draw:z-index="34"><draw:image xlink:href="Pictures/1000000100000226000000B7391E74F7.png" xlink:type="simple" xlink:show="embed" xlink:actuate="onLoad" draw:mime-type="image/png"/></draw:frame>Създаваме втори дъщерен процес, като клонираме бащиния. Проверяваме дали процеса е успешно създаден.</text:p>
      <text:p text:style-name="P33"><draw:frame draw:style-name="fr3" draw:name="Image36" text:anchor-type="char" svg:width="6.9252in" svg:height="3.478in" draw:z-index="35"><draw:image xlink:href="Pictures/100000010000046700000236B0AA7707.png" xlink:type="simple" xlink:show="embed" xlink:actuate="onLoad" draw:mime-type="image/png"/></draw:frame><text:soft-page-break/>Кода в този <text:span text:style-name="T1">if </text:span>оператор се изпълнява само от втория дъщерен процес. Насочваме стандартния вход на процеса към края за четене на тръбата. След това затваряме двата края на тръбата за този процес.</text:p>
      <text:p text:style-name="P33"/>
      <text:p text:style-name="P33">След това се създава масив, който съдържа командата, която ще презапише процеса. С <text:span text:style-name="T1">execvp </text:span>стартираме „/<text:span text:style-name="T1">bin/sh</text:span>“ и му подаваме следващите аргументи. Ако има грешка с промяната на програмата в процеса, <text:span text:style-name="T1">C </text:span>ще стигне до <text:span text:style-name="T1">perror </text:span>и ще изведе грешка и ще върне код „<text:span text:style-name="T1">1”.</text:span></text:p>
      <text:p text:style-name="P34"/>
      <text:p text:style-name="P33"><draw:frame draw:style-name="fr4" draw:name="Image37" text:anchor-type="char" svg:x="-0.0043in" svg:y="0.0862in" svg:width="3.7925in" svg:height="1in" draw:z-index="36"><draw:image xlink:href="Pictures/100000010000016C000000600B23E7F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>Извън <text:span text:style-name="T1">if </text:span>операторите затваряме двата края на тръбата, която така и не е използвана от бащиния процес.</text:p>
      <text:p text:style-name="P33"/>
      <text:p text:style-name="P35"><draw:frame draw:style-name="fr3" draw:name="Image38" text:anchor-type="char" svg:width="6.9252in" svg:height="3.0709in" draw:z-index="37"><draw:image xlink:href="Pictures/100000010000045A000001EE74B718F1.png" xlink:type="simple" xlink:show="embed" xlink:actuate="onLoad" draw:mime-type="image/png"/></draw:frame><text:soft-page-break/>Създаваме <text:span text:style-name="T1">status1 </text:span>и <text:span text:style-name="T1">status2, </text:span>които съдържат изходното състояние на двата процеса.</text:p>
      <text:p text:style-name="P36">След това проверяваме дали втория процес е излязал със статус код „<text:span text:style-name="T1">0” </text:span>и ако да, връщаме изходния код на втория процес.</text:p>
      <text:p text:style-name="P36">В противен случай проверяваме дали сигнал е прекъснал процеса и ако да задаваме <text:span text:style-name="T1">exit_code </text:span>да е равно на <text:span text:style-name="T1">128 + </text:span>сигнала.</text:p>
      <text:p text:style-name="P36"/>
      <text:p text:style-name="P36">Накрая връщаме <text:span text:style-name="T1">exit_code.</text:span></text:p>
      <text:p text:style-name="P37"/>
      <text:p text:style-name="P38">Задача 5: <text:span text:style-name="T1">worker</text:span></text:p>
      <text:p text:style-name="P39"><draw:frame draw:style-name="fr2" draw:name="Image39" text:anchor-type="char" svg:width="2.5in" svg:height="0.9791in" draw:z-index="38"><draw:image xlink:href="Pictures/10000001000000F00000005E3ABEC230.png" xlink:type="simple" xlink:show="embed" xlink:actuate="onLoad" draw:mime-type="image/png"/></draw:frame>Използвани библиотеки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3" draw:name="Image40" text:anchor-type="char" svg:width="6.9252in" svg:height="3.7339in" draw:z-index="39"><draw:image xlink:href="Pictures/10000001000004620000025DB8EB12A0.png" xlink:type="simple" xlink:show="embed" xlink:actuate="onLoad" draw:mime-type="image/png"/></draw:frame><text:soft-page-break/>Създавам променлява <text:span text:style-name="T1">keep_running, </text:span>която ще казва на програмата дали да проддължава да се изпълнява. Създавам променлива <text:span text:style-name="T1">usr1_received, </text:span>която сигнализира дали сигнала <text:span text:style-name="T1">usr1 </text:span>е бил получен.</text:p>
      <text:p text:style-name="P40">Volatile <text:span text:style-name="T2">означава, че компилатора няма да се опитва да оптимизира кода, като заменя някой променливи в цикли с </text:span>while(1) <text:span text:style-name="T2">ако променливите не се сменят.</text:span></text:p>
      <text:p text:style-name="P40">sig_atomic_t <text:span text:style-name="T2">означава че тези променливи ще бъдат записани или променени на един път, а не на няколко операции.</text:span></text:p>
      <text:p text:style-name="P40">handle_term() <text:span text:style-name="T2">и </text:span>handle_usr1() <text:span text:style-name="T2">са </text:span>handler-<text:span text:style-name="T2">и, които имат за цел да променят стойността на гореспоменатите промнливи при подаване на някакъв сигнал.</text:span></text:p>
      <text:p text:style-name="P41"><draw:frame draw:style-name="fr1" draw:name="Image41" text:anchor-type="char" svg:width="6.9252in" svg:height="2.322in" draw:z-index="40"><draw:image xlink:href="Pictures/100000010000046400000179207F8773.png" xlink:type="simple" xlink:show="embed" xlink:actuate="onLoad" draw:mime-type="image/png"/></draw:frame>Със <text:span text:style-name="T1">setvbuf </text:span>изхода от <text:span text:style-name="T1">printf </text:span>ще се изпраща към стандартния изход при срещане на нов ред, вместо да чака буфера да се напълни.</text:p>
      <text:p text:style-name="P41">Създава се структура <text:span text:style-name="T1">sigaction, </text:span>която описва какво да се случи при получаване на даден сигнал.</text:p>
      <text:p text:style-name="P41"><text:soft-page-break/>Със <text:span text:style-name="T1">sigemptyset </text:span>се инициализира маската от сигнали като празна, т.е. по време на изпълнението на обработчика няма да бъдат блокирани допълнителни сигнали.</text:p>
      <text:p text:style-name="P41">Със <text:span text:style-name="T1">sa_term.sa_flags = 0 </text:span>не се задават специални флагове и се използва стандартното поведение на <text:span text:style-name="T1">sigaction().</text:span></text:p>
      <text:p text:style-name="P42"/>
      <text:p text:style-name="P43"><draw:frame draw:style-name="fr1" draw:name="Image42" text:anchor-type="char" svg:width="6.9252in" svg:height="4.0854in" draw:z-index="41"><draw:image xlink:href="Pictures/10000001000003AB0000022ACEA4B05A.png" xlink:type="simple" xlink:show="embed" xlink:actuate="onLoad" draw:mime-type="image/png"/></draw:frame>Със <text:span text:style-name="T1">sigaction </text:span>указваме кой <text:span text:style-name="T1">handler </text:span>да се изпълни при подаване на определен сигнал.</text:p>
      <text:p text:style-name="P43">Създава се нова конфигурация за сигнал <text:span text:style-name="T1">sa_usr1 </text:span>и му се настройва <text:span text:style-name="T1">handler.</text:span></text:p>
      <text:p text:style-name="P43">Със „<text:span text:style-name="T1">sa_usr1.sa_flags = 0”, </text:span>се указва, че не се използват специални опции, а се прилага стандартното поведение на <text:span text:style-name="T1">sigaction().</text:span></text:p>
      <text:p text:style-name="P44"><draw:frame draw:style-name="fr4" draw:name="Image45" text:anchor-type="char" svg:x="0.0181in" svg:y="0.1327in" svg:width="2.698in" svg:height="0.4898in" draw:z-index="44"><draw:image xlink:href="Pictures/10000001000001030000002FFD5EEAF6.png" xlink:type="simple" xlink:show="embed" xlink:actuate="onLoad" draw:mime-type="image/png"/></draw:frame></text:p>
      <text:p text:style-name="P43"/>
      <text:p text:style-name="P43"/>
      <text:p text:style-name="P43">Създава се променлива брояч.</text:p>
      <text:p text:style-name="P44"/>
      <text:p text:style-name="P43"><draw:frame draw:style-name="fr4" draw:name="Image43" text:anchor-type="char" svg:x="0.0228in" svg:y="0.1709in" svg:width="4.0217in" svg:height="0.4374in" draw:z-index="42"><draw:image xlink:href="Pictures/10000001000001820000002AF82425D4.png" xlink:type="simple" xlink:show="embed" xlink:actuate="onLoad" draw:mime-type="image/png"/></draw:frame></text:p>
      <text:p text:style-name="P43"/>
      <text:p text:style-name="P43"/>
      <text:p text:style-name="P43">Създава се цикъл, който се изпълнява докъто <text:span text:style-name="T1">keep_running </text:span>е 1<text:span text:style-name="T1">, </text:span>тоест докъто <text:span text:style-name="T1">handler-</text:span>а не е извикан.</text:p>
      <text:p text:style-name="P43"/>
      <text:p text:style-name="P43"><draw:frame draw:style-name="fr3" draw:name="Image44" text:anchor-type="char" svg:width="6.9252in" svg:height="4.4508in" draw:z-index="43"><draw:image xlink:href="Pictures/10000001000003FB0000028FA87F3D1B.png" xlink:type="simple" xlink:show="embed" xlink:actuate="onLoad" draw:mime-type="image/png"/></draw:frame><text:soft-page-break/>Вътре в цикъла: изчаква се 1 секунда, проверява се дали <text:span text:style-name="T1">keep_running </text:span>все още е 1 <text:span text:style-name="T15">(</text:span><text:span text:style-name="T16">това е нужно защото докъто програмата е неактивна, заради </text:span><text:span text:style-name="T15">sleep(1), </text:span><text:span text:style-name="T16">и сигнал я събуди, ако няма проверка за </text:span><text:span text:style-name="T15">keep_running, C </text:span><text:span text:style-name="T16">ще увеличи брояча с 1 преди да спре програмата</text:span><text:span text:style-name="T15">)</text:span>, брояча се увеличава с 1 и се принтира неговата стойност. Накрая се проверява дали е получен потребителския сигнал <text:span text:style-name="T15">(</text:span><text:span text:style-name="T16">ако е получен </text:span><text:span text:style-name="T15">usr1_received </text:span><text:span text:style-name="T16">ще е равен на 1 от </text:span><text:span text:style-name="T15">handler-</text:span><text:span text:style-name="T16">а</text:span><text:span text:style-name="T15">)</text:span>, и съобщението се принтира на екрана, кокто и <text:span text:style-name="T1">usr1_received </text:span>става равно на 0.<draw:frame draw:style-name="fr2" draw:name="Image47" text:anchor-type="char" svg:width="4.3134in" svg:height="2.5835in" draw:z-index="46"><draw:image xlink:href="Pictures/100000010000019E000000F8AF424049.png" xlink:type="simple" xlink:show="embed" xlink:actuate="onLoad" draw:mime-type="image/png"/></draw:frame></text:p>
      <text:p text:style-name="P43"/>
      <text:p text:style-name="P43"><draw:frame draw:style-name="fr1" draw:name="Image46" text:anchor-type="char" svg:width="6.9252in" svg:height="0.9035in" draw:z-index="45"><draw:image xlink:href="Pictures/100000010000039F0000007941369161.png" xlink:type="simple" xlink:show="embed" xlink:actuate="onLoad" draw:mime-type="image/png"/></draw:frame>При излизане от цикъла, тоест при получаване на сигнал за прекъсване, се изписва колко секунди са минали от началото до терминирането на програмата.</text:p>
      <text:p text:style-name="P43"/>
      <text:p text:style-name="P45">Задача 6: <text:span text:style-name="T1">timerserver </text:span>и <text:span text:style-name="T1">timeclient</text:span></text:p>
      <text:p text:style-name="P46"/>
      <text:p text:style-name="P46"/>
      <text:p text:style-name="P46"/>
      <text:p text:style-name="P46"/>
      <text:p text:style-name="P46"><text:soft-page-break/></text:p>
      <text:p text:style-name="P47">timeserver.c<text:span text:style-name="T2">:</text:span></text:p>
      <text:p text:style-name="P46"/>
      <text:p text:style-name="P46"><draw:frame draw:style-name="fr5" draw:name="Image48" text:anchor-type="char" svg:width="4.3134in" svg:height="2.5835in" draw:z-index="47"><draw:image xlink:href="Pictures/100000010000019E000000F8AF424049.png" xlink:type="simple" xlink:show="embed" xlink:actuate="onLoad" draw:mime-type="image/png"/></draw:frame>Използвани библиотеки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49" text:anchor-type="char" svg:width="6.9252in" svg:height="1.4591in" draw:z-index="48"><draw:image xlink:href="Pictures/10000001000002E90000009DBA8BDF64.png" xlink:type="simple" xlink:show="embed" xlink:actuate="onLoad" draw:mime-type="image/png"/></draw:frame>Проверява се дали е подаден точно един аргумент.</text:p>
      <text:p text:style-name="P46"/>
      <text:p text:style-name="P46"><draw:frame draw:style-name="fr1" draw:name="Image50" text:anchor-type="char" svg:width="6.9252in" svg:height="1.9929in" draw:z-index="49"><draw:image xlink:href="Pictures/10000001000002C8000000CDD2178F12.png" xlink:type="simple" xlink:show="embed" xlink:actuate="onLoad" draw:mime-type="image/png"/></draw:frame>Създава се сокет, от <text:span text:style-name="T1">AF_INET </text:span>семейството, което указва на сокета, че ще използва протоколния стак на <text:span text:style-name="T1">Ipv4. </text:span>Указваме, че искаме транспортният протокол да е <text:span text:style-name="T1">TCP </text:span>със <text:span text:style-name="T1">SOCK_STREAM. </text:span>Понеже единствения протокол в <text:span text:style-name="T1">SOCK_STREAM </text:span>е <text:span text:style-name="T1">TCP, </text:span>избираме първия <text:span text:style-name="T1">(</text:span>използвайки <text:span text:style-name="T1">0). </text:span>Накрая проверяваме дали дали сокета е създаден успешно.</text:p>
      <text:p text:style-name="P46"><draw:frame draw:style-name="fr3" draw:name="Image51" text:anchor-type="char" svg:width="6.9252in" svg:height="3.3972in" draw:z-index="50"><draw:image xlink:href="Pictures/10000001000004300000020E682F9B59.png" xlink:type="simple" xlink:show="embed" xlink:actuate="onLoad" draw:mime-type="image/png"/></draw:frame><text:soft-page-break/>По подразбиране когато <text:span text:style-name="T1">TCP </text:span>връзката се затвори, използвания порт е недостъпен за нови връзки за около 1-2 минути, което означава, че при незабавно повторно изпълнение на програмата, тя ще даде грешка, казвайки, че порта вече се използва. Със <text:span text:style-name="T1">setsockopt </text:span>указваме, че искаме порта да бъде достъпен за използване, незабавно след затваряне на сокета. Използва се променливата <text:span text:style-name="T1">opt, </text:span>тъй като <text:span text:style-name="T1">setsockopt </text:span>изисква адрес от който да прочете дадена стойност за трети параметър.</text:p>
      <text:p text:style-name="P46"/>
      <text:p text:style-name="P46"><draw:frame draw:style-name="fr1" draw:name="Image52" text:anchor-type="char" svg:width="6.9252in" svg:height="2.9071in" draw:z-index="51"><draw:image xlink:href="Pictures/100000010000040C000001B326D4DC9E.png" xlink:type="simple" xlink:show="embed" xlink:actuate="onLoad" draw:mime-type="image/png"/></draw:frame>След създаване на сокета, трябва да му зададем адрес на който да слуша и порт. Това правим със структурата <text:span text:style-name="T1">sockaddr_in. </text:span>Първо я инициализираме, премахвайки случайни данни записани на нейното място в <text:span text:style-name="T1">RAM </text:span>паметта<text:span text:style-name="T1">. </text:span>След това задаваме семейство и <text:span text:style-name="T1">IP </text:span>адресите на локалните мрежови карти на устройството, на които искаме сървъра да слуша. <text:span text:style-name="T1">INADDR_ANY </text:span>е <text:soft-page-break/>заместител за стойността „0.0.0.0“, която конфигурира сокета да слуша на всички налични мрежови карти.</text:p>
      <text:p text:style-name="P46">След това се задава порт. Тъй като повечето <text:span text:style-name="T1">CPU-</text:span>та запазват информация във формат <text:span text:style-name="T1">Little Endian, </text:span>което означава, че байта с най-малка тежест се записва пръв, а повечето мрежови протоколи използват формат <text:span text:style-name="T1">Big Endian, </text:span>което означава, че байта с най-голяма тежест се записва пръв, трябва да обърнем реда на байтовете, които репрезентират порта, на който да се слуша, подаден като параметър.</text:p>
      <text:p text:style-name="P48">Със функцията <text:span text:style-name="T1">atoi, </text:span>се превръща номера на порт, запазен като <text:span text:style-name="T1">string, </text:span>в <text:span text:style-name="T1">int.</text:span></text:p>
      <text:p text:style-name="P49"/>
      <text:p text:style-name="P48"><draw:frame draw:style-name="fr1" draw:name="Image53" text:anchor-type="char" svg:width="6.9252in" svg:height="1.4335in" draw:z-index="52"><draw:image xlink:href="Pictures/100000010000044D000000E4EF95BC5A.png" xlink:type="simple" xlink:show="embed" xlink:actuate="onLoad" draw:mime-type="image/png"/></draw:frame>Със функцията <text:span text:style-name="T1">bind, </text:span>програмата свързва сокета с горесъздадената структура и проверява дали операцията е минала успешно.</text:p>
      <text:p text:style-name="P46"/>
      <text:p text:style-name="P48"><draw:frame draw:style-name="fr1" draw:name="Image54" text:anchor-type="char" svg:width="6.9252in" svg:height="1.0752in" draw:z-index="53"><draw:image xlink:href="Pictures/1000000100000433000000A77ADEC367.png" xlink:type="simple" xlink:show="embed" xlink:actuate="onLoad" draw:mime-type="image/png"/></draw:frame>Указва се на сокета да слуша за връзки, като най-много една връзка може да бъде инициирана наведнъж през него.</text:p>
      <text:p text:style-name="P48"/>
      <text:p text:style-name="P48"><draw:frame draw:style-name="fr1" draw:name="Image55" text:anchor-type="char" svg:width="6.9252in" svg:height="1.8555in" draw:z-index="54"><draw:image xlink:href="Pictures/10000001000003E80000010C832E8E8D.png" xlink:type="simple" xlink:show="embed" xlink:actuate="onLoad" draw:mime-type="image/png"/></draw:frame>Създава се сокет, базиран на първата заявка за връзка към сървърния сокет и се проверява дали създаването е било успешно.</text:p>
      <text:p text:style-name="P48"/>
      <text:p text:style-name="P50"><draw:frame draw:style-name="fr1" draw:name="Image56" text:anchor-type="char" svg:width="6.9252in" svg:height="1.6217in" draw:z-index="55"><draw:image xlink:href="Pictures/100000010000036B000000CDB2989A8D.png" xlink:type="simple" xlink:show="embed" xlink:actuate="onLoad" draw:mime-type="image/png"/></draw:frame>Първият ред взима текущото време от системния часовник във формат „<text:span text:style-name="T1">Unix Epoch Time</text:span>“, който представлява броят секунди, изминали от 1 януари 1970 година 0:<text:span text:style-name="T1">00 </text:span>часа.</text:p>
      <text:p text:style-name="P51">Със вторият ред, се създава структура, която използва датата запазена във формат „<text:span text:style-name="T1">Unix Epoch Time</text:span>“ като по този начин, може да се извлече информация за текущата дата във четим за човека формат.</text:p>
      <text:p text:style-name="P51">С третия ред се създава един стринг, който ще бъде изпратен по клиентския сокет до клиента.</text:p>
      <text:p text:style-name="P51">Функцията <text:span text:style-name="T1">strftime </text:span>взима като входни параметри, буфера, в който искаме да запазим изхода, формата, в който искаме да представим текущата дата в буфера и структурата, от която да се взима информация да датата.</text:p>
      <text:p text:style-name="P51"/>
      <text:p text:style-name="P51"><draw:frame draw:style-name="fr2" draw:name="Image57" text:anchor-type="char" svg:width="5.511in" svg:height="1.6563in" draw:z-index="56"><draw:image xlink:href="Pictures/10000001000002110000009F036E48F0.png" xlink:type="simple" xlink:show="embed" xlink:actuate="onLoad" draw:mime-type="image/png"/></draw:frame>Буфера се изпраща по клиентския сокет и накрая и двата сокета се затварят.</text:p>
      <text:p text:style-name="P51"/>
      <text:p text:style-name="P52">timeclient.c:</text:p>
      <text:p text:style-name="P52"/>
      <text:p text:style-name="P53"><draw:frame draw:style-name="fr2" draw:name="Image58" text:anchor-type="char" svg:width="3.4445in" svg:height="2.1307in" draw:z-index="57"><draw:image xlink:href="Pictures/1000000100000199000000FD74230C1E.png" xlink:type="simple" xlink:show="embed" xlink:actuate="onLoad" draw:mime-type="image/png"/></draw:frame>Използвани библиотеки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age59" text:anchor-type="char" svg:width="6.9252in" svg:height="1.2429in" draw:z-index="58"><draw:image xlink:href="Pictures/100000010000033E0000009519BF0C3C.png" xlink:type="simple" xlink:show="embed" xlink:actuate="onLoad" draw:mime-type="image/png"/></draw:frame><text:soft-page-break/>Проверява дали са подадени точно два параметъра.</text:p>
      <text:p text:style-name="P53"/>
      <text:p text:style-name="P53"><draw:frame draw:style-name="fr1" draw:name="Image60" text:anchor-type="char" svg:width="6.9252in" svg:height="2.1547in" draw:z-index="59"><draw:image xlink:href="Pictures/1000000100000303000000F06E278963.png" xlink:type="simple" xlink:show="embed" xlink:actuate="onLoad" draw:mime-type="image/png"/></draw:frame>Ако е подадено име на хост, вместо <text:span text:style-name="T1">IP </text:span>адрес<text:span text:style-name="T1">, </text:span>проверява дали съществува запис в локалната <text:span text:style-name="T1">DNS </text:span>таблица и ако не бъде намерено нищо <text:span text:style-name="T17">там, прави </text:span><text:span text:style-name="T18">lookup </text:span><text:span text:style-name="T17">през мрежата. Ако на </text:span><text:span text:style-name="T18">gethostbyname() </text:span><text:span text:style-name="T17">се подаде </text:span><text:span text:style-name="T18">IP </text:span><text:span text:style-name="T17">адрес, функцията просто ще го запази без да прави </text:span><text:span text:style-name="T18">DNS </text:span><text:span text:style-name="T17">заявка. Ако има грешка при създаването на структурата, програмата връща </text:span>грешка <text:span text:style-name="T17">на </text:span><text:span text:style-name="T18">STDERR</text:span>.</text:p>
      <text:p text:style-name="P53"/>
      <text:p text:style-name="P54"><draw:frame draw:style-name="fr1" draw:name="Image61" text:anchor-type="char" svg:width="6.9252in" svg:height="2.2398in" draw:z-index="60"><draw:image xlink:href="Pictures/10000001000002CA000000E7ACB31882.png" xlink:type="simple" xlink:show="embed" xlink:actuate="onLoad" draw:mime-type="image/png"/></draw:frame>Създава се сокет, от <text:span text:style-name="T1">AF_INET </text:span>семейството, което указва на сокета, че ще използва протоколния стак на <text:span text:style-name="T1">Ipv4. </text:span>Указваме, че искаме транспортният протокол да е <text:span text:style-name="T1">TCP </text:span>със <text:span text:style-name="T1">SOCK_STREAM. </text:span>Понеже единствения протокол в <text:span text:style-name="T1">SOCK_STREAM </text:span>е <text:span text:style-name="T1">TCP, </text:span>избираме първия <text:span text:style-name="T1">(</text:span>използвайки <text:span text:style-name="T1">0). </text:span>Накрая проверяваме дали дали сокета е създаден успешно.</text:p>
      <text:p text:style-name="P54"/>
      <text:p text:style-name="P55"><draw:frame draw:style-name="fr1" draw:name="Image62" text:anchor-type="char" svg:width="6.9252in" svg:height="1.3161in" draw:z-index="61"><draw:image xlink:href="Pictures/100000010000042C000000CBBAA9A44E.png" xlink:type="simple" xlink:show="embed" xlink:actuate="onLoad" draw:mime-type="image/png"/></draw:frame><text:soft-page-break/>Създава структура, която съдържа <text:span text:style-name="T1">IP </text:span>адреса и порта, на който ще изпраща клиентския сокет. Първо структурата се инициализира. После информацията от <text:span text:style-name="T1">DNS lookup-</text:span>а се копира в структурата. Накрая се задава порта, като се използва <text:span text:style-name="T1">htons </text:span>за да информацията, запазена във формат „<text:span text:style-name="T1">Little Endian” </text:span>да бъде преобразувана във формат „<text:span text:style-name="T1">Big Endian”. </text:span>Със функцията <text:span text:style-name="T1">atoi, </text:span>порта подаден като параметър, се превръща от <text:span text:style-name="T1">string </text:span>в <text:span text:style-name="T1">int.</text:span></text:p>
      <text:p text:style-name="P56"/>
      <text:p text:style-name="P57"><draw:frame draw:style-name="fr1" draw:name="Image63" text:anchor-type="char" svg:width="6.9252in" svg:height="1.9465in" draw:z-index="62"><draw:image xlink:href="Pictures/1000000100000332000000E6678E24D6.png" xlink:type="simple" xlink:show="embed" xlink:actuate="onLoad" draw:mime-type="image/png"/></draw:frame>Създава се буфер, в който да бъде запазен отговора на сървъра.</text:p>
      <text:p text:style-name="P57">Цикълът прочита изпратените данни блок по блок. Когато сървъра приключи, <text:span text:style-name="T1">n </text:span>става равно на 0, което прекъсва цикъла. Вътре в цикъла в последния елемент на масива се записва <text:span text:style-name="T1">\0 (</text:span>това е причината да се използва „-1“ за размер на буфера за четене<text:span text:style-name="T1">) </text:span>и се принтира този буфер. Сървърът може да изпрати повече от 127 бита, което ще означава, че буфера ще бъде презаписван и принтиран няколко пъти.</text:p>
      <text:p text:style-name="P57"/>
      <text:p text:style-name="P57"><draw:frame draw:style-name="fr4" draw:name="Image64" text:anchor-type="char" svg:x="0.011in" svg:y="0.1965in" svg:width="2.8126in" svg:height="0.448in" draw:z-index="63"><draw:image xlink:href="Pictures/100000010000010E0000002B4827CDBC.png" xlink:type="simple" xlink:show="embed" xlink:actuate="onLoad" draw:mime-type="image/png"/></draw:frame></text:p>
      <text:p text:style-name="P58"/>
      <text:p text:style-name="P57"/>
      <text:p text:style-name="P57">Накрая се затваря сокета.</text:p>
      <text:p text:style-name="P57"/>
      <text:p text:style-name="P59">Задача 7: <text:span text:style-name="T1">echoserver </text:span>и <text:span text:style-name="T1">echoclient</text:span></text:p>
      <text:p text:style-name="P60"/>
      <text:p text:style-name="P61">echoserver.c:</text:p>
      <text:p text:style-name="P61"/>
      <text:p text:style-name="P62"><draw:frame draw:style-name="fr5" draw:name="Image65" text:anchor-type="char" svg:width="3.2217in" svg:height="2.5874in" draw:z-index="64"><draw:image xlink:href="Pictures/10000001000001730000012ADB86B289.png" xlink:type="simple" xlink:show="embed" xlink:actuate="onLoad" draw:mime-type="image/png"/></draw:frame><text:soft-page-break/>Използвани библиотеки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><draw:frame draw:style-name="fr1" draw:name="Image66" text:anchor-type="char" svg:width="6.9252in" svg:height="1.2575in" draw:z-index="65"><draw:image xlink:href="Pictures/100000010000044D000000C83EFA0509.png" xlink:type="simple" xlink:show="embed" xlink:actuate="onLoad" draw:mime-type="image/png"/></draw:frame>Създава се <text:span text:style-name="T1">handler, </text:span>който да трие приключилите дъщерни процеси. С използване на опцията <text:span text:style-name="T1">WNOHANG </text:span>основния цикъл никога не се блокира от <text:span text:style-name="T1">handler-</text:span>а.</text:p>
      <text:p text:style-name="P63"/>
      <text:p text:style-name="P63"><draw:frame draw:style-name="fr1" draw:name="Image67" text:anchor-type="char" svg:width="6.9252in" svg:height="3.122in" draw:z-index="66"><draw:image xlink:href="Pictures/10000001000003750000018F7AF26454.png" xlink:type="simple" xlink:show="embed" xlink:actuate="onLoad" draw:mime-type="image/png"/></draw:frame>Тази функция създава буфер, който съдържа данните изпратени от клиента и му ки връща.</text:p>
      <text:p text:style-name="P63"/>
      <text:p text:style-name="P64"><draw:frame draw:style-name="fr3" draw:name="Image68" text:anchor-type="char" svg:width="6.9252in" svg:height="1.3752in" draw:z-index="67"><draw:image xlink:href="Pictures/10000001000002F80000009712D7EC24.png" xlink:type="simple" xlink:show="embed" xlink:actuate="onLoad" draw:mime-type="image/png"/></draw:frame><text:soft-page-break/>Във функцията <text:span text:style-name="T1">main </text:span>се проверява дали е подаден точно един параметър.</text:p>
      <text:p text:style-name="P64"/>
      <text:p text:style-name="P64"><draw:frame draw:style-name="fr1" draw:name="Image69" text:anchor-type="char" svg:width="6.9252in" svg:height="2.539in" draw:z-index="68"><draw:image xlink:href="Pictures/10000001000003F100000172E0F1E891.png" xlink:type="simple" xlink:show="embed" xlink:actuate="onLoad" draw:mime-type="image/png"/></draw:frame>Създава се структура, която дефинира при какъв сигнал, кой <text:span text:style-name="T1">handler </text:span>да бъде извикан и какви настройки да бъдат използвани. <text:span text:style-name="T1">SA_RESTART </text:span>предотватява прекъснати системни извиквания <text:span text:style-name="T1">(</text:span>като <text:span text:style-name="T1">accept) </text:span>да предизвика срив на програмата.</text:p>
      <text:p text:style-name="P64">Сигналът <text:span text:style-name="T1">SIGCHLD </text:span>се изпраща от ядрото на <text:span text:style-name="T1">Linux </text:span>към бащин процес когато някой то дъщерните му процеси промени състоянието си, най-често когато дъщерния процес е терминиран или спре.</text:p>
      <text:p text:style-name="P64"/>
      <text:p text:style-name="P64"/>
      <text:p text:style-name="P64"><draw:frame draw:style-name="fr2" draw:name="Image70" text:anchor-type="char" svg:width="6.0917in" svg:height="1.65in" draw:z-index="69"><draw:image xlink:href="Pictures/10000000000002DB000000C6EF728FDE.png" xlink:type="simple" xlink:show="embed" xlink:actuate="onLoad" draw:mime-type="image/png"/></draw:frame></text:p>
      <text:p text:style-name="P65"><text:span text:style-name="T19">Създава се сокет, от </text:span><text:span text:style-name="T20">AF_INET </text:span><text:span text:style-name="T19">семейството, което указва на сокета, че ще използва протоколния стак на </text:span><text:span text:style-name="T20">Ipv4. </text:span><text:span text:style-name="T19">Указваме, че искаме транспортният протокол да е </text:span><text:span text:style-name="T20">TCP </text:span><text:span text:style-name="T19">със </text:span><text:span text:style-name="T20">SOCK_STREAM. </text:span><text:span text:style-name="T19">Понеже единствения протокол в </text:span><text:soft-page-break/><text:span text:style-name="T20">SOCK_STREAM </text:span><text:span text:style-name="T19">е </text:span><text:span text:style-name="T20">TCP, </text:span><text:span text:style-name="T19">избираме първия </text:span><text:span text:style-name="T20">(</text:span><text:span text:style-name="T19">използвайки </text:span><text:span text:style-name="T20">0). </text:span><text:span text:style-name="T19">Накрая проверяваме дали дали сокета е създаден успешно.</text:span></text:p>
      <text:p text:style-name="P66"/>
      <text:p text:style-name="P67"><draw:frame draw:style-name="fr1" draw:name="Image71" text:anchor-type="char" svg:width="6.9252in" svg:height="0.6161in" draw:z-index="70"><draw:image xlink:href="Pictures/10000001000003F30000005A9E250B26.png" xlink:type="simple" xlink:show="embed" xlink:actuate="onLoad" draw:mime-type="image/png"/></draw:frame><text:span text:style-name="T21">Задават се параметри, които да </text:span><text:span text:style-name="T22">бъдат</text:span><text:span text:style-name="T21"> използвани за сокета. </text:span><text:span text:style-name="T23">Със </text:span><text:span text:style-name="T24">setsockopt </text:span><text:span text:style-name="T23">указваме, че искаме порта да бъде достъпен за използване, незабавно след затваряне на сокета.</text:span></text:p>
      <text:p text:style-name="P68"/>
      <text:p text:style-name="P69"><draw:frame draw:style-name="fr2" draw:name="Image72" text:anchor-type="char" svg:width="6.0319in" svg:height="1.8228in" draw:z-index="71"><draw:image xlink:href="Pictures/1000000100000243000000AF1AC69EF9.png" xlink:type="simple" xlink:show="embed" xlink:actuate="onLoad" draw:mime-type="image/png"/></draw:frame>Създава се структура, която да зададе семейство, адреси, на които да слуша сокета, и порт.</text:p>
      <text:p text:style-name="P69"/>
      <text:p text:style-name="P69"><draw:frame draw:style-name="fr1" draw:name="Image73" text:anchor-type="char" svg:width="6.9252in" svg:height="1.4126in" draw:z-index="72"><draw:image xlink:href="Pictures/10000001000003D4000000C84EB61E46.png" xlink:type="simple" xlink:show="embed" xlink:actuate="onLoad" draw:mime-type="image/png"/></draw:frame>Свързва се сокета с гореспоменатата структура.</text:p>
      <text:p text:style-name="P69"/>
      <text:p text:style-name="P69"/>
      <text:p text:style-name="P69"/>
      <text:p text:style-name="P69"/>
      <text:p text:style-name="P69"/>
      <text:p text:style-name="P69"><draw:frame draw:style-name="fr4" draw:name="Image74" text:anchor-type="char" svg:x="-0.0028in" svg:y="-0.0736in" svg:width="4.9693in" svg:height="2.1146in" draw:z-index="73"><draw:image xlink:href="Pictures/10000001000001DD000000CBFD77B326.png" xlink:type="simple" xlink:show="embed" xlink:actuate="onLoad" draw:mime-type="image/png"/></draw:frame><text:soft-page-break/></text:p>
      <text:p text:style-name="P69"/>
      <text:p text:style-name="P69"/>
      <text:p text:style-name="P69"/>
      <text:p text:style-name="P69"/>
      <text:p text:style-name="P69"/>
      <text:p text:style-name="P69">Задава се сокета да слуша за клиенти и да позволява до десет клиента наведниж. <text:span text:style-name="T1">Listen </text:span>връща или 0 <text:span text:style-name="T1">(</text:span>сокета успешно е сложен в състояние на слушане<text:span text:style-name="T1">), </text:span>или -1 <text:span text:style-name="T1">(</text:span>когато има грешка<text:span text:style-name="T1">).</text:span></text:p>
      <text:p text:style-name="P70"/>
      <text:p text:style-name="P71"><draw:frame draw:style-name="fr4" draw:name="Image75" text:anchor-type="char" svg:x="0.0272in" svg:y="-0.1201in" svg:width="2.0626in" svg:height="0.3752in" draw:z-index="74"><draw:image xlink:href="Pictures/10000001000000C60000002463AB9924.png" xlink:type="simple" xlink:show="embed" xlink:actuate="onLoad" draw:mime-type="image/png"/></draw:frame></text:p>
      <text:p text:style-name="P71">Създава се безкраен цикъл.</text:p>
      <text:p text:style-name="P72"/>
      <text:p text:style-name="P71"><draw:frame draw:style-name="fr1" draw:name="Image76" text:anchor-type="char" svg:width="6.9252in" svg:height="1.2043in" draw:z-index="75"><draw:image xlink:href="Pictures/10000001000003FF000000B2E7DFCE48.png" xlink:type="simple" xlink:show="embed" xlink:actuate="onLoad" draw:mime-type="image/png"/></draw:frame>Създава се клиентски сокет. Ако създаването се провали, заради сигнал <text:span text:style-name="T1">handler-</text:span>а на <text:span text:style-name="T1">SIGCHLD, </text:span>цикъла продължава със следващата итерация.</text:p>
      <text:p text:style-name="P71"/>
      <text:p text:style-name="P71"><draw:frame draw:style-name="fr1" draw:name="Image77" text:anchor-type="char" svg:width="6.9252in" svg:height="3.0327in" draw:z-index="76"><draw:image xlink:href="Pictures/1000000100000488000001FCE2CB4307.png" xlink:type="simple" xlink:show="embed" xlink:actuate="onLoad" draw:mime-type="image/png"/></draw:frame><text:soft-page-break/>Създава се дъщерен процес, който е копие на текущия. Блокът код под <text:span text:style-name="T1">pid==0 </text:span>се изпълнява само на дъщерния процес. При него се затваря сървърния сокет и се извиква функцията <text:span text:style-name="T1">handle_client, </text:span>която прочита информацията изпратена от клиента и му я връща и затваря клиентския сокет. След това се връща изходен код 0.</text:p>
      <text:p text:style-name="P71">Кодът под <text:span text:style-name="T1">pid &gt; 0 </text:span>се изпълнява само на бащиния процес. При него клиентския сокет се затваря.</text:p>
      <text:p text:style-name="P71">Кодът под <text:span text:style-name="T1">else </text:span>се изпълнява когато има грешка при създаването.</text:p>
      <text:p text:style-name="P71"/>
      <text:p text:style-name="P71"><draw:frame draw:style-name="fr4" draw:name="Image78" text:anchor-type="char" svg:x="0.0161in" svg:y="0.1835in" svg:width="3.0209in" svg:height="0.4791in" draw:z-index="77"><draw:image xlink:href="Pictures/10000001000001220000002EE963697A.png" xlink:type="simple" xlink:show="embed" xlink:actuate="onLoad" draw:mime-type="image/png"/></draw:frame></text:p>
      <text:p text:style-name="P71"/>
      <text:p text:style-name="P71">При излизане от цикъла се затваря сървърния сокет.</text:p>
      <text:p text:style-name="P71"/>
      <text:p text:style-name="P73">echoclient.c:</text:p>
      <text:p text:style-name="P73"/>
      <text:p text:style-name="P74"/>
      <text:p text:style-name="P74"/>
      <text:p text:style-name="P74"/>
      <text:p text:style-name="P74"/>
      <text:p text:style-name="P75"><draw:frame draw:style-name="fr5" draw:name="Image79" text:anchor-type="char" svg:width="3.8752in" svg:height="2.6665in" draw:z-index="78"><draw:image xlink:href="Pictures/100000010000017400000100A8115216.png" xlink:type="simple" xlink:show="embed" xlink:actuate="onLoad" draw:mime-type="image/png"/></draw:frame><text:soft-page-break/>Използвани библиотеки.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5"><draw:frame draw:style-name="fr1" draw:name="Image80" text:anchor-type="char" svg:width="6.9252in" svg:height="1.3264in" draw:z-index="79"><draw:image xlink:href="Pictures/100000010000033E0000009F8B0468D1.png" xlink:type="simple" xlink:show="embed" xlink:actuate="onLoad" draw:mime-type="image/png"/></draw:frame>Проверява дали са подадени точно три аргумента.</text:p>
      <text:p text:style-name="P75"/>
      <text:p text:style-name="P75"><draw:frame draw:style-name="fr4" draw:name="Image81" text:anchor-type="char" svg:x="0.0319in" svg:y="0.2134in" svg:width="4.1047in" svg:height="1.3957in" draw:z-index="80"><draw:image xlink:href="Pictures/100000010000018A000000864966A509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>Създадени са три променливи, които да запазят трите подадени параметъра. Порта се преобразува в <text:span text:style-name="T1">int </text:span>от <text:span text:style-name="T1">string.</text:span></text:p>
      <text:p text:style-name="P77"/>
      <text:p text:style-name="P75"><draw:frame draw:style-name="fr1" draw:name="Image82" text:anchor-type="char" svg:width="6.9252in" svg:height="1.7307in" draw:z-index="81"><draw:image xlink:href="Pictures/1000000100000318000000C65CB853B2.png" xlink:type="simple" xlink:show="embed" xlink:actuate="onLoad" draw:mime-type="image/png"/></draw:frame><text:soft-page-break/>Прави <text:span text:style-name="T1">DNS lookup, </text:span>в случай, че е подадено име на хост, а не <text:span text:style-name="T1">IP </text:span>адрес. Ако е подаден <text:span text:style-name="T1">IP </text:span>адрес, той ще бъде запазен без <text:span text:style-name="T1">DNS </text:span>заявка.</text:p>
      <text:p text:style-name="P75"/>
      <text:p text:style-name="P78"><draw:frame draw:style-name="fr1" draw:name="Image83" text:anchor-type="char" svg:width="6.9252in" svg:height="1.978in" draw:z-index="82"><draw:image xlink:href="Pictures/10000001000002AE000000C42027BC30.png" xlink:type="simple" xlink:show="embed" xlink:actuate="onLoad" draw:mime-type="image/png"/></draw:frame>Създава се сокет, от <text:span text:style-name="T1">AF_INET </text:span>семейството, което указва на сокета, че ще използва протоколния стак на <text:span text:style-name="T1">Ipv4. </text:span>Указваме, че искаме транспортният протокол да е <text:span text:style-name="T1">TCP </text:span>със <text:span text:style-name="T1">SOCK_STREAM. </text:span>Понеже единствения протокол в <text:span text:style-name="T1">SOCK_STREAM </text:span>е <text:span text:style-name="T1">TCP, </text:span>избираме първия <text:span text:style-name="T1">(</text:span>използвайки <text:span text:style-name="T1">0). </text:span>Накрая проверяваме дали дали сокета е създаден успешно.</text:p>
      <text:p text:style-name="P78"/>
      <text:p text:style-name="P79"><draw:frame draw:style-name="fr1" draw:name="Image84" text:anchor-type="char" svg:width="6.9252in" svg:height="1.1063in" draw:z-index="83"><draw:image xlink:href="Pictures/1000000100000428000000AAE089F7E5.png" xlink:type="simple" xlink:show="embed" xlink:actuate="onLoad" draw:mime-type="image/png"/></draw:frame>Създава се структура, която задава семейство, <text:span text:style-name="T1">IP </text:span>адреси, на които да слуша сокета, и порт.</text:p>
      <text:p text:style-name="P79"/>
      <text:p text:style-name="P79"><draw:frame draw:style-name="fr1" draw:name="Image85" text:anchor-type="char" svg:width="6.9252in" svg:height="1.3264in" draw:z-index="84"><draw:image xlink:href="Pictures/10000001000003EF000000C1D8444B49.png" xlink:type="simple" xlink:show="embed" xlink:actuate="onLoad" draw:mime-type="image/png"/></draw:frame>Клиентския сокет се свързва със сървъра.</text:p>
      <text:p text:style-name="P79"><draw:frame draw:style-name="fr2" draw:name="Image86" text:anchor-type="char" svg:width="6.678in" svg:height="1.052in" draw:z-index="85"><draw:image xlink:href="Pictures/10000001000002810000006542BE6B4E.png" xlink:type="simple" xlink:show="embed" xlink:actuate="onLoad" draw:mime-type="image/png"/></draw:frame><text:soft-page-break/>Изпраща се подаденото съобщение към сървъра.</text:p>
      <text:p text:style-name="P79"/>
      <text:p text:style-name="P79"><draw:frame draw:style-name="fr1" draw:name="Image87" text:anchor-type="char" svg:width="6.9252in" svg:height="2.5618in" draw:z-index="86"><draw:image xlink:href="Pictures/10000001000002DF00000110770658FD.png" xlink:type="simple" xlink:show="embed" xlink:actuate="onLoad" draw:mime-type="image/png"/></draw:frame>Прочита се отговора на сървъра и се принтира.</text:p>
      <text:p text:style-name="P79"/>
      <text:p text:style-name="P79"/>
      <text:p text:style-name="P79"><draw:frame draw:style-name="fr2" draw:name="Image88" text:anchor-type="char" svg:width="2.9165in" svg:height="0.5209in" draw:z-index="87"><draw:image xlink:href="Pictures/1000000100000118000000326A560C55.png" xlink:type="simple" xlink:show="embed" xlink:actuate="onLoad" draw:mime-type="image/png"/></draw:frame>Затваря се сокета.</text:p>
      <text:p text:style-name="P79"/>
      <text:p text:style-name="P79"/>
      <text:p text:style-name="P79"/>
      <text:p text:style-name="P79"/>
      <text:p text:style-name="P80">Използвани източници:</text:p>
      <text:p text:style-name="P81"/>
      <text:p text:style-name="P81"><text:a xlink:type="simple" xlink:href="https://geeksforgeeks.com/" text:style-name="Internet_20_link" text:visited-style-name="Visited_20_Internet_20_Link">https://geeksforgeeks.com</text:a></text:p>
      <text:p text:style-name="P81"/>
      <text:p text:style-name="P82"><text:a xlink:type="simple" xlink:href="https://cppreference.com/" text:style-name="Internet_20_link" text:visited-style-name="Visited_20_Internet_20_Link">https://cppreference.com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21:05:25.026981100</meta:creation-date>
    <dc:date>2026-06-04T13:46:28.861546100</dc:date>
    <meta:editing-duration>PT1H45M25S</meta:editing-duration>
    <meta:editing-cycles>17</meta:editing-cycles>
    <meta:generator>LibreOffice/26.2.3.2$Windows_X86_64 LibreOffice_project/70e089b17412e4cb7773e41413306b17a2328c34</meta:generator>
    <meta:document-statistic meta:table-count="0" meta:image-count="88" meta:object-count="0" meta:page-count="30" meta:paragraph-count="146" meta:word-count="2659" meta:character-count="16928" meta:non-whitespace-character-count="14408"/>
  </office:meta>
</office:document-meta>
</file>