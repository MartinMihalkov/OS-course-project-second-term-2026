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F80000005D61742D1D.png" manifest:media-type="image/png"/>
  <manifest:file-entry manifest:full-path="Pictures/1000000100000480000000A023AA4382.png" manifest:media-type="image/png"/>
  <manifest:file-entry manifest:full-path="Pictures/10000001000004600000006C03B77FCB.png" manifest:media-type="image/png"/>
  <manifest:file-entry manifest:full-path="Pictures/10000001000004540000008C47EA4463.png" manifest:media-type="image/png"/>
  <manifest:file-entry manifest:full-path="Pictures/10000001000004570000013F9B69A41D.png" manifest:media-type="image/png"/>
  <manifest:file-entry manifest:full-path="Pictures/10000001000004260000006A7798D147.png" manifest:media-type="image/png"/>
  <manifest:file-entry manifest:full-path="Pictures/100000010000046700000236B0AA7707.png" manifest:media-type="image/png"/>
  <manifest:file-entry manifest:full-path="Pictures/10000001000000F200000082F50B02C9.png" manifest:media-type="image/png"/>
  <manifest:file-entry manifest:full-path="Pictures/100000010000028A000000F5D6D6E43E.png" manifest:media-type="image/png"/>
  <manifest:file-entry manifest:full-path="Pictures/10000001000002FE0000002ABD69A71A.png" manifest:media-type="image/png"/>
  <manifest:file-entry manifest:full-path="Pictures/100000010000042B0000012738DD8E0C.png" manifest:media-type="image/png"/>
  <manifest:file-entry manifest:full-path="Pictures/1000000100000261000000C91A349311.png" manifest:media-type="image/png"/>
  <manifest:file-entry manifest:full-path="Pictures/1000000100000410000001A12A88BCA5.png" manifest:media-type="image/png"/>
  <manifest:file-entry manifest:full-path="Pictures/1000000100000464000001ED3D35E47A.png" manifest:media-type="image/png"/>
  <manifest:file-entry manifest:full-path="Pictures/10000001000001EE00000047DFBC8E48.png" manifest:media-type="image/png"/>
  <manifest:file-entry manifest:full-path="Pictures/10000001000001C50000002C103A9B2D.png" manifest:media-type="image/png"/>
  <manifest:file-entry manifest:full-path="Pictures/100000010000014000000083687A6F9B.png" manifest:media-type="image/png"/>
  <manifest:file-entry manifest:full-path="Pictures/10000001000002260000010344ECE804.png" manifest:media-type="image/png"/>
  <manifest:file-entry manifest:full-path="Pictures/10000001000002060000009F85A7988E.png" manifest:media-type="image/png"/>
  <manifest:file-entry manifest:full-path="Pictures/100000010000024E000000824F6A75E9.png" manifest:media-type="image/png"/>
  <manifest:file-entry manifest:full-path="Pictures/1000000100000226000000B7391E74F7.png" manifest:media-type="image/png"/>
  <manifest:file-entry manifest:full-path="Pictures/10000001000002A3000000346967C849.png" manifest:media-type="image/png"/>
  <manifest:file-entry manifest:full-path="Pictures/1000000100000240000002035C6AF27E.png" manifest:media-type="image/png"/>
  <manifest:file-entry manifest:full-path="Pictures/10000001000001320000002344B7CE29.png" manifest:media-type="image/png"/>
  <manifest:file-entry manifest:full-path="Pictures/10000001000000FD000000249A805D59.png" manifest:media-type="image/png"/>
  <manifest:file-entry manifest:full-path="Pictures/100000010000018A0000003A554938A6.png" manifest:media-type="image/png"/>
  <manifest:file-entry manifest:full-path="Pictures/100000010000041B000000A60B7506E5.png" manifest:media-type="image/png"/>
  <manifest:file-entry manifest:full-path="Pictures/100000010000033A000001ACCEE27277.png" manifest:media-type="image/png"/>
  <manifest:file-entry manifest:full-path="Pictures/100000010000015E000000A646928A77.png" manifest:media-type="image/png"/>
  <manifest:file-entry manifest:full-path="Pictures/100000010000016C000000600B23E7F2.png" manifest:media-type="image/png"/>
  <manifest:file-entry manifest:full-path="Pictures/100000010000011A0000001950159B0D.png" manifest:media-type="image/png"/>
  <manifest:file-entry manifest:full-path="Pictures/10000001000001120000001BCAA774B4.png" manifest:media-type="image/png"/>
  <manifest:file-entry manifest:full-path="Pictures/1000000100000459000001029B6CE295.png" manifest:media-type="image/png"/>
  <manifest:file-entry manifest:full-path="Pictures/1000000100000466000001AA1E1D500C.png" manifest:media-type="image/png"/>
  <manifest:file-entry manifest:full-path="Pictures/10000001000001A500000023AEFA5BC7.png" manifest:media-type="image/png"/>
  <manifest:file-entry manifest:full-path="Pictures/100000010000028700000131740B1A17.png" manifest:media-type="image/png"/>
  <manifest:file-entry manifest:full-path="Pictures/10000001000004600000025AB4013864.png" manifest:media-type="image/png"/>
  <manifest:file-entry manifest:full-path="Pictures/100000010000045A000001EE74B718F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8pt" fo:language="bg" fo:country="BG" fo:font-weight="bold" officeooo:rsid="0011b570" officeooo:paragraph-rsid="0011b57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fo:language="bg" fo:country="BG" fo:font-weight="bold" officeooo:rsid="0011b570" officeooo:paragraph-rsid="0011b57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fo:language="bg" fo:country="BG" fo:font-weight="bold" officeooo:rsid="0011b570" officeooo:paragraph-rsid="0011b57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left" style:justify-single-word="false"/>
      <style:text-properties style:font-name="Arial1" fo:font-size="14pt" fo:language="bg" fo:country="BG" fo:font-weight="bold" officeooo:rsid="0011b570" officeooo:paragraph-rsid="0011b57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left" style:justify-single-word="false"/>
      <style:text-properties style:font-name="Arial1" fo:font-size="14pt" fo:language="en" fo:country="US" fo:font-weight="bold" officeooo:rsid="0011b570" officeooo:paragraph-rsid="0011b57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left" style:justify-single-word="false"/>
      <style:text-properties style:font-name="Arial1" fo:font-size="14pt" fo:language="bg" fo:country="BG" fo:font-weight="normal" officeooo:rsid="0011b570" officeooo:paragraph-rsid="0011b57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left" style:justify-single-word="false"/>
      <style:text-properties style:font-name="Arial1" fo:font-size="14pt" fo:language="en" fo:country="US" fo:font-weight="normal" officeooo:rsid="0011b570" officeooo:paragraph-rsid="0011b57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left" style:justify-single-word="false"/>
      <style:text-properties style:font-name="Arial1" fo:font-size="14pt" fo:language="bg" fo:country="BG" fo:font-weight="normal" officeooo:rsid="00126cba" officeooo:paragraph-rsid="0011b57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left" style:justify-single-word="false"/>
      <style:text-properties style:font-name="Arial1" fo:font-size="14pt" fo:language="bg" fo:country="BG" fo:font-weight="normal" officeooo:rsid="00126cba" officeooo:paragraph-rsid="00126cb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left" style:justify-single-word="false"/>
      <style:text-properties style:font-name="Arial1" fo:font-size="14pt" fo:language="bg" fo:country="BG" fo:font-weight="normal" officeooo:rsid="0013cf70" officeooo:paragraph-rsid="0013cf7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left" style:justify-single-word="false"/>
      <style:text-properties style:font-name="Arial1" fo:font-size="14pt" fo:language="bg" fo:country="BG" fo:font-weight="normal" officeooo:rsid="0013eda6" officeooo:paragraph-rsid="0013eda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left" style:justify-single-word="false"/>
      <style:text-properties style:font-name="Arial1" fo:font-size="14pt" fo:language="bg" fo:country="BG" fo:font-weight="bold" officeooo:rsid="001445c9" officeooo:paragraph-rsid="001445c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left" style:justify-single-word="false"/>
      <style:text-properties style:font-name="Arial1" fo:font-size="14pt" fo:language="en" fo:country="US" fo:font-weight="bold" officeooo:rsid="001445c9" officeooo:paragraph-rsid="001445c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left" style:justify-single-word="false"/>
      <style:text-properties style:font-name="Arial1" fo:font-size="14pt" fo:language="bg" fo:country="BG" fo:font-weight="normal" officeooo:rsid="0014e5c7" officeooo:paragraph-rsid="0014e5c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left" style:justify-single-word="false"/>
      <style:text-properties style:font-name="Arial1" fo:font-size="14pt" fo:language="en" fo:country="US" fo:font-weight="normal" officeooo:rsid="0014e5c7" officeooo:paragraph-rsid="0014e5c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left" style:justify-single-word="false"/>
      <style:text-properties style:font-name="Arial1" fo:font-size="14pt" fo:language="bg" fo:country="BG" fo:font-weight="normal" officeooo:rsid="00167bbf" officeooo:paragraph-rsid="00167bb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67bbf" officeooo:paragraph-rsid="00167bb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bold" officeooo:rsid="00167bbf" officeooo:paragraph-rsid="00167bb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7f175" officeooo:paragraph-rsid="0017f175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4pt" fo:language="en" fo:country="US" fo:font-weight="normal" officeooo:rsid="0017f175" officeooo:paragraph-rsid="0017f17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97278" officeooo:paragraph-rsid="00197278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4pt" fo:language="en" fo:country="US" fo:font-weight="normal" officeooo:rsid="00197278" officeooo:paragraph-rsid="00197278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a29b2" officeooo:paragraph-rsid="0019727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b010e" officeooo:paragraph-rsid="001b010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b9bf3" officeooo:paragraph-rsid="001b9bf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paragraph-rsid="001b9bf3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4pt" fo:language="en" fo:country="US" fo:font-weight="normal" officeooo:rsid="001cc176" officeooo:paragraph-rsid="001b9bf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cc176" officeooo:paragraph-rsid="001cc17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cc2b4" officeooo:paragraph-rsid="001cc2b4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4pt" fo:language="en" fo:country="US" fo:font-weight="normal" officeooo:rsid="001cc2b4" officeooo:paragraph-rsid="001cc2b4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ce553" officeooo:paragraph-rsid="001ce553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bold" officeooo:rsid="001ce553" officeooo:paragraph-rsid="001ce55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cfa33" officeooo:paragraph-rsid="001cfa3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4pt" fo:language="en" fo:country="US" fo:font-weight="normal" officeooo:rsid="001cfa33" officeooo:paragraph-rsid="001cfa33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4pt" fo:language="bg" fo:country="BG" fo:font-weight="normal" officeooo:rsid="001d9684" officeooo:paragraph-rsid="001d968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normal" officeooo:rsid="001d9684" officeooo:paragraph-rsid="001d9684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4pt" fo:language="en" fo:country="US" fo:font-style="normal" fo:font-weight="normal" officeooo:rsid="001d9684" officeooo:paragraph-rsid="001d9684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4pt" fo:language="bg" fo:country="BG" fo:font-style="normal" fo:font-weight="bold" officeooo:rsid="001dd31c" officeooo:paragraph-rsid="001dd31c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4pt" fo:language="en" fo:country="US" fo:font-style="normal" fo:font-weight="bold" officeooo:rsid="001dd31c" officeooo:paragraph-rsid="001dd31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bg" fo:country="BG"/>
    </style:style>
    <style:style style:name="T3" style:family="text">
      <style:text-properties fo:language="bg" fo:country="BG" officeooo:rsid="00126cba"/>
    </style:style>
    <style:style style:name="T4" style:family="text">
      <style:text-properties officeooo:rsid="00167bbf"/>
    </style:style>
    <style:style style:name="T5" style:family="text">
      <style:text-properties fo:language="en" fo:country="US" officeooo:rsid="00167bbf"/>
    </style:style>
    <style:style style:name="T6" style:family="text">
      <style:text-properties officeooo:rsid="00197278"/>
    </style:style>
    <style:style style:name="T7" style:family="text">
      <style:text-properties fo:language="en" fo:country="US" officeooo:rsid="00197278"/>
    </style:style>
    <style:style style:name="T8" style:family="text">
      <style:text-properties fo:language="bg" fo:country="BG" officeooo:rsid="001a29b2"/>
    </style:style>
    <style:style style:name="T9" style:family="text">
      <style:text-properties officeooo:rsid="001a29b2"/>
    </style:style>
    <style:style style:name="T10" style:family="text">
      <style:text-properties style:font-name="Arial1" fo:font-size="14pt" fo:language="bg" fo:country="BG" fo:font-weight="normal" officeooo:rsid="001b9bf3" style:font-size-asian="14pt" style:font-weight-asian="normal" style:font-size-complex="14pt" style:font-weight-complex="normal"/>
    </style:style>
    <style:style style:name="T11" style:family="text">
      <style:text-properties style:font-name="Arial1" fo:font-size="14pt" fo:language="en" fo:country="US" fo:font-weight="normal" officeooo:rsid="001b9bf3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loext:opacity="100%" fo:font-family="'Google Sans', Arial, sans-serif" fo:font-size="15pt" fo:letter-spacing="normal" fo:language="bg" fo:country="BG" fo:font-style="normal" fo:font-weight="normal" officeooo:rsid="001b9bf3" style:font-size-asian="14pt" style:font-weight-asian="normal" style:font-size-complex="14pt" style:font-weight-complex="normal" loext:padding="0in" loext:border="none"/>
    </style:style>
    <style:style style:name="T13" style:family="text">
      <style:text-properties style:font-name="Arial1" fo:font-size="14pt" fo:language="bg" fo:country="BG" fo:font-weight="normal" officeooo:rsid="001cc176" style:font-size-asian="14pt" style:font-weight-asian="normal" style:font-size-complex="14pt" style:font-weight-complex="normal"/>
    </style:style>
    <style:style style:name="T14" style:family="text">
      <style:text-properties style:font-name="Arial1" fo:font-size="14pt" fo:language="en" fo:country="US" fo:font-weight="normal" officeooo:rsid="001cc176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сов проект по предмета „<text:span text:style-name="T1">Операционни системи“</text:span></text:p>
      <text:p text:style-name="P2">на Мартин Михалков</text:p>
      <text:p text:style-name="P3"/>
      <text:p text:style-name="P3">Вариант: „7 задачи“</text:p>
      <text:p text:style-name="P3"/>
      <text:p text:style-name="P4">Задача 1: <text:span text:style-name="T1">hexdump</text:span></text:p>
      <text:p text:style-name="P5"/>
      <text:p text:style-name="P6">Използвани библиотеки:</text:p>
      <text:p text:style-name="P5"/>
      <text:p text:style-name="P4"/>
      <text:p text:style-name="P6"><draw:frame draw:style-name="fr1" draw:name="Image1" text:anchor-type="char" svg:width="6.9252in" svg:height="0.6673in" draw:z-index="0"><draw:image xlink:href="Pictures/10000001000004600000006C03B77FCB.png" xlink:type="simple" xlink:show="embed" xlink:actuate="onLoad" draw:mime-type="image/png"/></draw:frame>Функция, която принтира съобщение на екрана, като автоматично намира дължината на подадения <text:span text:style-name="T1">string.</text:span></text:p>
      <text:p text:style-name="P6"><draw:frame draw:style-name="fr1" draw:name="Image2" text:anchor-type="char" svg:width="6.9252in" svg:height="0.8744in" draw:z-index="1"><draw:image xlink:href="Pictures/10000001000004540000008C47EA4463.png" xlink:type="simple" xlink:show="embed" xlink:actuate="onLoad" draw:mime-type="image/png"/></draw:frame>Използвани променливи:</text:p>
      <text:p text:style-name="P6">- <text:span text:style-name="T1">fd – </text:span>файлов дескриптор на отворения файл.</text:p>
      <text:p text:style-name="P6">- <text:span text:style-name="T1">bytes_read – </text:span>брой байтове от 0 до <text:span text:style-name="T1">BUFFER_SIZE, </text:span>които остават за текущия буфер <text:span text:style-name="T1">(</text:span>текущия ред<text:span text:style-name="T1">).</text:span></text:p>
      <text:p text:style-name="P7">- buf[] - <text:span text:style-name="T2">стринг, съдържащ </text:span><text:span text:style-name="T3">текущия буфер.</text:span></text:p>
      <text:p text:style-name="P8">- <text:span text:style-name="T1">hex_chars – </text:span>използван за преобразуването, в шестнадесетичен формат.</text:p>
      <text:p text:style-name="P6"/>
      <text:p text:style-name="P9"><draw:frame draw:style-name="fr1" draw:name="Image3" text:anchor-type="char" svg:width="6.9252in" svg:height="0.961in" draw:z-index="2"><draw:image xlink:href="Pictures/1000000100000480000000A023AA4382.png" xlink:type="simple" xlink:show="embed" xlink:actuate="onLoad" draw:mime-type="image/png"/></draw:frame></text:p>
      <text:p text:style-name="P9"/>
      <text:p text:style-name="P9"/>
      <text:p text:style-name="P9"><draw:frame draw:style-name="fr1" draw:name="Image4" text:anchor-type="char" svg:width="6.9252in" svg:height="1.9874in" draw:z-index="3"><draw:image xlink:href="Pictures/10000001000004570000013F9B69A41D.png" xlink:type="simple" xlink:show="embed" xlink:actuate="onLoad" draw:mime-type="image/png"/></draw:frame><text:soft-page-break/>Проверява дали точно един параметър е наличен <text:span text:style-name="T1">(</text:span>първият елемент в<text:span text:style-name="T1"> argc </text:span>е пътя до изпълнимия файл<text:span text:style-name="T1">)</text:span></text:p>
      <text:p text:style-name="P9">Отваря файла само за четене.</text:p>
      <text:p text:style-name="P9"><draw:frame draw:style-name="fr1" draw:name="Image5" text:anchor-type="char" svg:width="6.9252in" svg:height="0.6909in" draw:z-index="4"><draw:image xlink:href="Pictures/10000001000004260000006A7798D147.png" xlink:type="simple" xlink:show="embed" xlink:actuate="onLoad" draw:mime-type="image/png"/></draw:frame>Цикъла се повтаря докъто има поне един байт, останал за четене.</text:p>
      <text:p text:style-name="P9"/>
      <text:p text:style-name="P10"><draw:frame draw:style-name="fr2" draw:name="Image6" text:anchor-type="char" svg:width="6.7717in" svg:height="2.552in" draw:z-index="5"><draw:image xlink:href="Pictures/100000010000028A000000F5D6D6E43E.png" xlink:type="simple" xlink:show="embed" xlink:actuate="onLoad" draw:mime-type="image/png"/></draw:frame>За всеки цикъл на <text:span text:style-name="T1">while, for </text:span>цикъла се изпълнява за всички битове в буфера. <text:span text:style-name="T1">bytes_read </text:span>запазва броят на байтовете в текущия буфер.<text:span text:style-name="T1"> bytes_read</text:span> е или колкото<text:span text:style-name="T1"> BUFFER_SIZE,</text:span> или по-малко. Ако в текущия буфер все още има байтове за печатана, те се превръщат в шестнадесетичен формат в <text:span text:style-name="T1">if </text:span>оператора<text:span text:style-name="T1">. </text:span>Накрай принтираме преобразувания байт на стандартния изход <text:span text:style-name="T1">(</text:span>фаилов дескриптор <text:span text:style-name="T1">1).</text:span></text:p>
      <text:p text:style-name="P10"/>
      <text:p text:style-name="P10">Ако наличният брой байтове е по-малък от буфера, замествамете всеки байт с „ <text:s/>„.</text:p>
      <text:p text:style-name="P10"/>
      <text:p text:style-name="P11"><draw:frame draw:style-name="fr3" draw:name="Image7" text:anchor-type="char" svg:width="6.9252in" svg:height="1.9138in" draw:z-index="6"><draw:image xlink:href="Pictures/100000010000042B0000012738DD8E0C.png" xlink:type="simple" xlink:show="embed" xlink:actuate="onLoad" draw:mime-type="image/png"/></draw:frame><text:soft-page-break/>След принтирането на шестнадесетичния формат на даден байт, определяме, дали да принтираме „ <text:s/>“ или „ “, в зависимост дали текущо принтираният байт е осмия <text:span text:style-name="T1">(</text:span>с индекс <text:span text:style-name="T1">7) </text:span>или не, съответно<text:span text:style-name="T1">.</text:span></text:p>
      <text:p text:style-name="P11"/>
      <text:p text:style-name="P11"><draw:frame draw:style-name="fr4" draw:name="Image8" text:anchor-type="char" svg:x="0.8374in" svg:y="0in" svg:width="5.2508in" svg:height="0.9689in" draw:z-index="7"><draw:image xlink:href="Pictures/10000001000001F80000005D61742D1D.png" xlink:type="simple" xlink:show="embed" xlink:actuate="onLoad" draw:mime-type="image/png"/></draw:frame></text:p>
      <text:p text:style-name="P11"/>
      <text:p text:style-name="P11">Отделя шестнадесетичното представяне с <text:span text:style-name="T1">ASCII </text:span>представянето на битовете принтирайки „ <text:s text:c="2"/>„.</text:p>
      <text:p text:style-name="P11"/>
      <text:p text:style-name="P11"><draw:frame draw:style-name="fr3" draw:name="Image9" text:anchor-type="char" svg:width="6.9252in" svg:height="2.7756in" draw:z-index="8"><draw:image xlink:href="Pictures/1000000100000410000001A12A88BCA5.png" xlink:type="simple" xlink:show="embed" xlink:actuate="onLoad" draw:mime-type="image/png"/></draw:frame>ояа</text:p>
      <text:p text:style-name="P11">За всеки байт от текущия буфер или принтира <text:span text:style-name="T1">ASCII </text:span>формата на байта<text:span text:style-name="T1">, </text:span>или принтира „.“<text:span text:style-name="T1">, </text:span>ако няма повече байтове в текущия буфер<text:span text:style-name="T1">. </text:span>За байтовете, които трабва да бъдат принтирани, <text:span text:style-name="T1">C </text:span>проверява дали те могат да бъдат представени като символи <text:span text:style-name="T1">(</text:span>ако имат код между 32 и <text:span text:style-name="T1">127) </text:span>или не, и ако не, програмата замества байта с „.“<text:span text:style-name="T1">.</text:span></text:p>
      <text:p text:style-name="P11"><draw:frame draw:style-name="fr1" draw:name="Image10" text:anchor-type="char" svg:width="6.9252in" svg:height="0.3791in" draw:z-index="9"><draw:image xlink:href="Pictures/10000001000002FE0000002ABD69A71A.png" xlink:type="simple" xlink:show="embed" xlink:actuate="onLoad" draw:mime-type="image/png"/></draw:frame>Накрая на всяка итерация на <text:span text:style-name="T1">while(), </text:span>се принтира нов ред.</text:p>
      <text:p text:style-name="P11"/>
      <text:p text:style-name="P11"><draw:frame draw:style-name="fr4" draw:name="Image11" text:anchor-type="char" svg:x="0.0102in" svg:y="0.0575in" svg:width="4.7193in" svg:height="0.4583in" draw:z-index="10"><draw:image xlink:href="Pictures/10000001000001C50000002C103A9B2D.png" xlink:type="simple" xlink:show="embed" xlink:actuate="onLoad" draw:mime-type="image/png"/></draw:frame><text:soft-page-break/></text:p>
      <text:p text:style-name="P11"/>
      <text:p text:style-name="P11"/>
      <text:p text:style-name="P11">Затваря се отворения файл.</text:p>
      <text:p text:style-name="P11"/>
      <text:p text:style-name="P12">Задача 2: <text:span text:style-name="T1">reverse</text:span></text:p>
      <text:p text:style-name="P13"/>
      <text:p text:style-name="P14"><draw:frame draw:style-name="fr2" draw:name="Image12" text:anchor-type="char" svg:width="3.3335in" svg:height="1.3646in" draw:z-index="11"><draw:image xlink:href="Pictures/100000010000014000000083687A6F9B.png" xlink:type="simple" xlink:show="embed" xlink:actuate="onLoad" draw:mime-type="image/png"/></draw:frame>Използвани библиотеки и задаване на размер на буфера.</text:p>
      <text:p text:style-name="P14"/>
      <text:p text:style-name="P14"/>
      <text:p text:style-name="P14"/>
      <text:p text:style-name="P14"/>
      <text:p text:style-name="P14"><draw:frame draw:style-name="fr2" draw:name="Image13" text:anchor-type="char" svg:width="5.7299in" svg:height="2.698in" draw:z-index="12"><draw:image xlink:href="Pictures/10000001000002260000010344ECE804.png" xlink:type="simple" xlink:show="embed" xlink:actuate="onLoad" draw:mime-type="image/png"/></draw:frame>Проверява се дали е подаден точно един параметър. Отваря файла подаден като аргумент в режим на четене и писане и връща грешка ако не може да се оправи.</text:p>
      <text:p text:style-name="P14"><draw:frame draw:style-name="fr2" draw:name="Image14" text:anchor-type="char" svg:width="5.3965in" svg:height="1.6563in" draw:z-index="13"><draw:image xlink:href="Pictures/10000001000002060000009F85A7988E.png" xlink:type="simple" xlink:show="embed" xlink:actuate="onLoad" draw:mime-type="image/png"/></draw:frame>Намираме размера на файла, чрез използване на <text:span text:style-name="T1">lseek, </text:span>която връща позицията на курсора след преместването. <text:span text:style-name="T1">Lseek </text:span>в случай премества курсора на текущия файл дескриптор в края на файла.</text:p>
      <text:p text:style-name="P14"/>
      <text:p text:style-name="P14"><draw:frame draw:style-name="fr2" draw:name="Image15" text:anchor-type="char" svg:width="6.1465in" svg:height="1.3543in" draw:z-index="14"><draw:image xlink:href="Pictures/100000010000024E000000824F6A75E9.png" xlink:type="simple" xlink:show="embed" xlink:actuate="onLoad" draw:mime-type="image/png"/></draw:frame><draw:frame draw:style-name="fr4" draw:name="Image16" text:anchor-type="char" svg:x="-1.4583in" svg:y="0.8909in" svg:width="6.9252in" svg:height="0.5335in" draw:z-index="15"><draw:image xlink:href="Pictures/10000001000002A3000000346967C849.png" xlink:type="simple" xlink:show="embed" xlink:actuate="onLoad" draw:mime-type="image/png"/></draw:frame><text:soft-page-break/>Създавам масив, който да запазва буфера, <text:span text:style-name="T1">left </text:span>и <text:span text:style-name="T1">right </text:span>запазващи индекса на първия и последния блок.</text:p>
      <text:p text:style-name="P14">Цикъла прави итерации докъто индекса на <text:span text:style-name="T1">left </text:span>и индекса на <text:span text:style-name="T1">right </text:span>не се срещнат<text:span text:style-name="T1">.</text:span></text:p>
      <text:p text:style-name="P15"/>
      <text:p text:style-name="P14"><draw:frame draw:style-name="fr2" draw:name="Image17" text:anchor-type="char" svg:width="4.8516in" svg:height="4.3374in" draw:z-index="16"><draw:image xlink:href="Pictures/1000000100000240000002035C6AF27E.png" xlink:type="simple" xlink:show="embed" xlink:actuate="onLoad" draw:mime-type="image/png"/></draw:frame>За всяка итерация на цикъла създаваме две променливи, които съдържат байта определен от индексите на <text:span text:style-name="T1">left </text:span>и <text:span text:style-name="T1">right </text:span>съответно<text:span text:style-name="T1">. </text:span><text:span text:style-name="T4">Пълвият </text:span><text:span text:style-name="T5">lseek </text:span><text:span text:style-name="T4">премества курсора до позицията на </text:span><text:span text:style-name="T5">left </text:span><text:span text:style-name="T4">и запазва байта в </text:span><text:span text:style-name="T5">left_char.</text:span></text:p>
      <text:p text:style-name="P16">Вторият <text:span text:style-name="T1">lseek </text:span>премества курсора до позицията на <text:span text:style-name="T1">right </text:span>и запазва байта в <text:span text:style-name="T1">right_char.</text:span></text:p>
      <text:p text:style-name="P17">Третият <text:span text:style-name="T1">lseek </text:span>премества отново курсора на позицията на <text:span text:style-name="T1">left, </text:span>но този път презаписва байта с байта записан в <text:span text:style-name="T1">right_char.</text:span></text:p>
      <text:p text:style-name="P17">Четвъртият <text:span text:style-name="T1">lseek </text:span>премества курсора на позицията на <text:span text:style-name="T1">right </text:span>и презаписва байта с байта записан в <text:span text:style-name="T1">left_char.</text:span></text:p>
      <text:p text:style-name="P17">Накрая <text:span text:style-name="T1">left </text:span>и <text:span text:style-name="T1">right </text:span>се преместват навътре.</text:p>
      <text:p text:style-name="P17"/>
      <text:p text:style-name="P17"><draw:frame draw:style-name="fr4" draw:name="Image18" text:anchor-type="char" svg:x="-0.0063in" svg:y="-0.1866in" svg:width="3.1874in" svg:height="0.3646in" draw:z-index="17"><draw:image xlink:href="Pictures/10000001000001320000002344B7CE29.png" xlink:type="simple" xlink:show="embed" xlink:actuate="onLoad" draw:mime-type="image/png"/></draw:frame><text:soft-page-break/></text:p>
      <text:p text:style-name="P17">Затвяряне на файла.</text:p>
      <text:p text:style-name="P17"/>
      <text:p text:style-name="P18">Задача 3: <text:span text:style-name="T1">prun</text:span></text:p>
      <text:p text:style-name="P17"/>
      <text:p text:style-name="P17"><draw:frame draw:style-name="fr5" draw:name="Image19" text:anchor-type="char" svg:width="2.5209in" svg:height="1.3543in" draw:z-index="18"><draw:image xlink:href="Pictures/10000001000000F200000082F50B02C9.png" xlink:type="simple" xlink:show="embed" xlink:actuate="onLoad" draw:mime-type="image/png"/></draw:frame>Използвани библиотеки.</text:p>
      <text:p text:style-name="P17"/>
      <text:p text:style-name="P17"/>
      <text:p text:style-name="P17"/>
      <text:p text:style-name="P17"/>
      <text:p text:style-name="P17"/>
      <text:p text:style-name="P17"/>
      <text:p text:style-name="P19"><draw:frame draw:style-name="fr4" draw:name="Image20" text:anchor-type="char" svg:x="0.0264in" svg:y="0.0728in" svg:width="2.6354in" svg:height="0.3752in" draw:z-index="19"><draw:image xlink:href="Pictures/10000001000000FD000000249A805D59.png" xlink:type="simple" xlink:show="embed" xlink:actuate="onLoad" draw:mime-type="image/png"/></draw:frame></text:p>
      <text:p text:style-name="P19"/>
      <text:p text:style-name="P19"/>
      <text:p text:style-name="P19">Проверява дали имо поне един подаден параметър.</text:p>
      <text:p text:style-name="P19"/>
      <text:p text:style-name="P19"><draw:frame draw:style-name="fr4" draw:name="Image21" text:anchor-type="char" svg:x="0.0264in" svg:y="0.1264in" svg:width="5.1465in" svg:height="0.7398in" draw:z-index="20"><draw:image xlink:href="Pictures/10000001000001EE00000047DFBC8E48.png" xlink:type="simple" xlink:show="embed" xlink:actuate="onLoad" draw:mime-type="image/png"/></draw:frame></text:p>
      <text:p text:style-name="P19"/>
      <text:p text:style-name="P19"/>
      <text:p text:style-name="P19"/>
      <text:p text:style-name="P19">Запазва броя на подадените параметри в <text:span text:style-name="T1">num_cmds </text:span>и заделя динамично памет за <text:span text:style-name="T1">PID-</text:span>тата на всички процеси, които ще бъдат създадени <text:span text:style-name="T1">(</text:span>по един процес за всеки подаден параметър<text:span text:style-name="T1">).</text:span></text:p>
      <text:p text:style-name="P20"/>
      <text:p text:style-name="P19"><draw:frame draw:style-name="fr4" draw:name="Image22" text:anchor-type="char" svg:x="0.0118in" svg:y="0.0673in" svg:width="4.1047in" svg:height="0.6043in" draw:z-index="21"><draw:image xlink:href="Pictures/100000010000018A0000003A554938A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>Цикъла се изпълнява за всеки процес.</text:p>
      <text:p text:style-name="P19"/>
      <text:p text:style-name="P20"><draw:frame draw:style-name="fr4" draw:name="Image23" text:anchor-type="char" svg:x="0.039in" svg:y="0.5626in" svg:width="3.6457in" svg:height="1.7291in" draw:z-index="22"><draw:image xlink:href="Pictures/100000010000015E000000A646928A77.png" xlink:type="simple" xlink:show="embed" xlink:actuate="onLoad" draw:mime-type="image/png"/></draw:frame>Fork() <text:span text:style-name="T2">връща </text:span>PID-<text:span text:style-name="T2">то на дъщерния процес който е създал. Ако </text:span>fork() <text:span text:style-name="T2">върне число &lt; </text:span>0<text:span text:style-name="T2">, значи има грешка при създаването на процеса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<draw:frame draw:style-name="fr1" draw:name="Image24" text:anchor-type="char" svg:width="6.9252in" svg:height="3.5874in" draw:z-index="23"><draw:image xlink:href="Pictures/100000010000033A000001ACCEE27277.png" xlink:type="simple" xlink:show="embed" xlink:actuate="onLoad" draw:mime-type="image/png"/></draw:frame>Кода в <text:span text:style-name="T1">if </text:span>оператора се изпълнява само на дъщерния процес. Бащерният го пропуска.</text:p>
      <text:p text:style-name="P19">Отваря се файла „/<text:span text:style-name="T1">dev/null” </text:span>към който пренасочваме стандартния изход, така, че изхода от подадените команди да не се принтира. След това <text:span text:style-name="T6">затваряме „</text:span><text:span text:style-name="T7">/dev/null”.</text:span></text:p>
      <text:p text:style-name="P21">След това съставяме <text:span text:style-name="T1">args, </text:span>който представлява команда, изпълняваща подадената команда в /<text:span text:style-name="T1">bin/sh.</text:span></text:p>
      <text:p text:style-name="P22">I execvp <text:span text:style-name="T2">презаписваме програмата на дъщерния процес, </text:span><text:span text:style-name="T8">с командата, която искаме да изпълним. Подадени са два параметъра на </text:span><text:span text:style-name="T9">execvp</text:span><text:span text:style-name="T8">: първо подаваме командата извъкваща „/</text:span><text:span text:style-name="T9">bin/sh</text:span><text:span text:style-name="T8">“ и после на нея подаваме останалите параметри.</text:span></text:p>
      <text:p text:style-name="P23"/>
      <text:p text:style-name="P24"><draw:frame draw:style-name="fr4" draw:name="Image25" text:anchor-type="char" svg:x="0.0071in" svg:y="0.1874in" svg:width="2.9374in" svg:height="0.2602in" draw:z-index="24"><draw:image xlink:href="Pictures/100000010000011A0000001950159B0D.png" xlink:type="simple" xlink:show="embed" xlink:actuate="onLoad" draw:mime-type="image/png"/></draw:frame></text:p>
      <text:p text:style-name="P24"/>
      <text:p text:style-name="P24"/>
      <text:p text:style-name="P24">Създаваме променлива, която следи процесите, които все още не са завършили. Отначало се приема, че никои процес не е завършил.</text:p>
      <text:p text:style-name="P24"><draw:frame draw:style-name="fr4" draw:name="Image26" text:anchor-type="char" svg:x="0.0283in" svg:y="0.1453in" svg:width="2.8543in" svg:height="0.2811in" draw:z-index="25"><draw:image xlink:href="Pictures/10000001000001120000001BCAA774B4.png" xlink:type="simple" xlink:show="embed" xlink:actuate="onLoad" draw:mime-type="image/png"/></draw:frame></text:p>
      <text:p text:style-name="P24"/>
      <text:p text:style-name="P25">Цикъла се повтаря докъто има все още изпълняващи се процеси.</text:p>
      <text:p text:style-name="P26"><draw:frame draw:style-name="fr3" draw:name="Image27" text:anchor-type="char" svg:width="6.9252in" svg:height="1.6047in" draw:z-index="26"><draw:image xlink:href="Pictures/1000000100000459000001029B6CE295.png" xlink:type="simple" xlink:show="embed" xlink:actuate="onLoad" draw:mime-type="image/png"/></draw:frame><text:soft-page-break/><text:span text:style-name="T10">Създава променлива </text:span><text:span text:style-name="T11">status, </text:span><text:span text:style-name="T10">която съдържа изходната информация от </text:span><text:span text:style-name="T11">waitpid, </text:span><text:span text:style-name="T10">кайто изчиства дъщерните процеси, така, че да не станат „зомби“ процеси </text:span><text:span text:style-name="T11">(</text:span><text:span text:style-name="T12">процеси, които са приключили, но все още са в таблицата с процеси</text:span><text:span text:style-name="T11">)</text:span><text:span text:style-name="T10">. </text:span><text:span text:style-name="T13">„-</text:span><text:span text:style-name="T14">1</text:span><text:span text:style-name="T13">“, означава, че функцията ще работи за всеки процес и записва изходния код в </text:span><text:span text:style-name="T14">status. </text:span><text:span text:style-name="T13">„</text:span><text:span text:style-name="T14">0</text:span><text:span text:style-name="T13">“, означава, че се използват настройките по подразбиране. </text:span><text:span text:style-name="T14">Waitpid </text:span><text:span text:style-name="T13">връща или -</text:span><text:span text:style-name="T14">1 (</text:span><text:span text:style-name="T13">грешка</text:span><text:span text:style-name="T14">), </text:span><text:span text:style-name="T13">или 0 </text:span><text:span text:style-name="T14">(</text:span><text:span text:style-name="T13">процеса не си е сменил състоянието; при променяне на настройките</text:span><text:span text:style-name="T14">), </text:span><text:span text:style-name="T13">или &gt;</text:span><text:span text:style-name="T14">0 (PID-</text:span><text:span text:style-name="T13">то на дъщерния процес, чието състояние се е променило.</text:span><text:span text:style-name="T14">)</text:span></text:p>
      <text:p text:style-name="P27"/>
      <text:p text:style-name="P28">Проверява се дали има грешка при изпълнението.</text:p>
      <text:p text:style-name="P28"/>
      <text:p text:style-name="P29"><draw:frame draw:style-name="fr1" draw:name="Image28" text:anchor-type="char" svg:width="6.9252in" svg:height="2.6193in" draw:z-index="27"><draw:image xlink:href="Pictures/1000000100000466000001AA1E1D500C.png" xlink:type="simple" xlink:show="embed" xlink:actuate="onLoad" draw:mime-type="image/png"/></draw:frame>Цикъл, който намира кой индекс от масива <text:span text:style-name="T1">pids </text:span>е равен на <text:span text:style-name="T1">PID-</text:span>то на завършения процес.</text:p>
      <text:p text:style-name="P30">exit_code <text:span text:style-name="T2">съдържа или изходния код, ако процеса е завършил успешно, или сигнала, който го е терминирал, ако процеса не е завършил успешно.</text:span></text:p>
      <text:p text:style-name="P29"/>
      <text:p text:style-name="P31">Принтира се <text:span text:style-name="T1">PID-</text:span>то<text:span text:style-name="T1">, </text:span>командата и изходния код на процеса<text:span text:style-name="T1">.</text:span></text:p>
      <text:p text:style-name="P31">Задава <text:span text:style-name="T1">PID-</text:span>то на текущия процес да е равно на „-1“ в <text:span text:style-name="T1">pids.</text:span></text:p>
      <text:p text:style-name="P31">Намаляваме <text:span text:style-name="T1">remaining </text:span>с 1. Използваме <text:span text:style-name="T1">break; </text:span>за да прекъснем цикъла, защото вече сме намерили процеса, който търсим.</text:p>
      <text:p text:style-name="P31"/>
      <text:p text:style-name="P31"/>
      <text:p text:style-name="P31"/>
      <text:p text:style-name="P31"><draw:frame draw:style-name="fr4" draw:name="Image29" text:anchor-type="char" svg:x="0.0319in" svg:y="0.0173in" svg:width="4.3862in" svg:height="0.3646in" draw:z-index="28"><draw:image xlink:href="Pictures/10000001000001A500000023AEFA5BC7.png" xlink:type="simple" xlink:show="embed" xlink:actuate="onLoad" draw:mime-type="image/png"/></draw:frame><text:soft-page-break/></text:p>
      <text:p text:style-name="P31"/>
      <text:p text:style-name="P31">Освобождава се алокираното място.</text:p>
      <text:p text:style-name="P31"/>
      <text:p text:style-name="P32">Задача 4: <text:span text:style-name="T1">pipe2</text:span></text:p>
      <text:p text:style-name="P31">Използвани библиотеки.</text:p>
      <text:p text:style-name="P31"/>
      <text:p text:style-name="P31"/>
      <text:p text:style-name="P31"/>
      <text:p text:style-name="P31"><draw:frame draw:style-name="fr1" draw:name="Image30" text:anchor-type="char" svg:width="6.9252in" svg:height="1.0929in" draw:z-index="29"><draw:image xlink:href="Pictures/100000010000041B000000A60B7506E5.png" xlink:type="simple" xlink:show="embed" xlink:actuate="onLoad" draw:mime-type="image/png"/></draw:frame><draw:frame draw:style-name="fr4" draw:name="Image31" text:anchor-type="char" svg:x="-0.0228in" svg:y="1.75in" svg:width="6.7402in" svg:height="3.1772in" draw:z-index="30"><draw:image xlink:href="Pictures/100000010000028700000131740B1A17.png" xlink:type="simple" xlink:show="embed" xlink:actuate="onLoad" draw:mime-type="image/png"/></draw:frame></text:p>
      <text:p text:style-name="P31"/>
      <text:p text:style-name="P31">Проверява дали са подадени точно два параметъра и създава два масива, които съдържата двата параметъра.</text:p>
      <text:p text:style-name="P31"/>
      <text:p text:style-name="P31"><draw:frame draw:style-name="fr3" draw:name="Image32" text:anchor-type="char" svg:width="6.9252in" svg:height="3.0366in" draw:z-index="31"><draw:image xlink:href="Pictures/1000000100000464000001ED3D35E47A.png" xlink:type="simple" xlink:show="embed" xlink:actuate="onLoad" draw:mime-type="image/png"/></draw:frame><text:soft-page-break/>Създава се масив от тип <text:span text:style-name="T1">int, </text:span>който съдържа файловите дескриптори на двата края на анонимна тръба. Проверява дали тръбата е създадена успешно.</text:p>
      <text:p text:style-name="P33"><draw:frame draw:style-name="fr2" draw:name="Image33" text:anchor-type="char" svg:width="6.3445in" svg:height="2.0937in" draw:z-index="32"><draw:image xlink:href="Pictures/1000000100000261000000C91A349311.png" xlink:type="simple" xlink:show="embed" xlink:actuate="onLoad" draw:mime-type="image/png"/></draw:frame>Клонира текущия процес и създава нов дъщерен процес. Проверява дали е създаден успешно.</text:p>
      <text:p text:style-name="P33"/>
      <text:p text:style-name="P33"><draw:frame draw:style-name="fr1" draw:name="Image34" text:anchor-type="char" svg:width="6.9252in" svg:height="3.7217in" draw:z-index="33"><draw:image xlink:href="Pictures/10000001000004600000025AB4013864.png" xlink:type="simple" xlink:show="embed" xlink:actuate="onLoad" draw:mime-type="image/png"/></draw:frame><text:soft-page-break/>Кода в този <text:span text:style-name="T1">if </text:span>оператор се изпълнява само от първия дъщерен процес.</text:p>
      <text:p text:style-name="P33">Клонира се стандартния изход в записващия край на тръбата. След това тръбата се затваря за първия процес. ТОВА, ЧЕ Е ЗАТВОРЕНА ТРЪБАТА ЗА ПЪРВИЯ ПРОЦЕС, НЕ ЗНАЧИ, ЧЕ Е ЗАТВОРЕНА ЗА ВТОРИЯ ПРОЦЕС.</text:p>
      <text:p text:style-name="P33"/>
      <text:p text:style-name="P33">След това се създава масив, който съдържа командата, която ще презапише процеса. С <text:span text:style-name="T1">execvp </text:span>стартираме „/<text:span text:style-name="T1">bin/sh</text:span>“ и му подаваме следващите аргументи. Ако има грешка с промяната на програмата в процеса, <text:span text:style-name="T1">C </text:span>ще стигне до <text:span text:style-name="T1">perror </text:span>и ще изведе грешка и ще върне код „<text:span text:style-name="T1">1”.</text:span></text:p>
      <text:p text:style-name="P34"/>
      <text:p text:style-name="P33"><draw:frame draw:style-name="fr2" draw:name="Image35" text:anchor-type="char" svg:width="5.7299in" svg:height="1.9063in" draw:z-index="34"><draw:image xlink:href="Pictures/1000000100000226000000B7391E74F7.png" xlink:type="simple" xlink:show="embed" xlink:actuate="onLoad" draw:mime-type="image/png"/></draw:frame>Създаваме втори дъщерен процес, като клонираме бащиния. Проверяваме дали процеса е успешно създаден.</text:p>
      <text:p text:style-name="P33"><draw:frame draw:style-name="fr3" draw:name="Image36" text:anchor-type="char" svg:width="6.9252in" svg:height="3.478in" draw:z-index="35"><draw:image xlink:href="Pictures/100000010000046700000236B0AA7707.png" xlink:type="simple" xlink:show="embed" xlink:actuate="onLoad" draw:mime-type="image/png"/></draw:frame><text:soft-page-break/>Кода в този <text:span text:style-name="T1">if </text:span>оператор се изпълнява само от втория дъщерен процес. Насочваме стандартния вход на процеса към края за четене на тръбата. След това затваряме двата края на тръбата за този процес.</text:p>
      <text:p text:style-name="P33"/>
      <text:p text:style-name="P33">След това се създава масив, който съдържа командата, която ще презапише процеса. С <text:span text:style-name="T1">execvp </text:span>стартираме „/<text:span text:style-name="T1">bin/sh</text:span>“ и му подаваме следващите аргументи. Ако има грешка с промяната на програмата в процеса, <text:span text:style-name="T1">C </text:span>ще стигне до <text:span text:style-name="T1">perror </text:span>и ще изведе грешка и ще върне код „<text:span text:style-name="T1">1”.</text:span></text:p>
      <text:p text:style-name="P34"/>
      <text:p text:style-name="P33"><draw:frame draw:style-name="fr4" draw:name="Image37" text:anchor-type="char" svg:x="-0.0043in" svg:y="0.0862in" svg:width="3.7925in" svg:height="1in" draw:z-index="36"><draw:image xlink:href="Pictures/100000010000016C000000600B23E7F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>Извън <text:span text:style-name="T1">if </text:span>операторите затваряме двата края на тръбата, която така и не е използвана от бащиния процес.</text:p>
      <text:p text:style-name="P33"/>
      <text:p text:style-name="P35"><draw:frame draw:style-name="fr3" draw:name="Image38" text:anchor-type="char" svg:width="6.9252in" svg:height="3.0709in" draw:z-index="37"><draw:image xlink:href="Pictures/100000010000045A000001EE74B718F1.png" xlink:type="simple" xlink:show="embed" xlink:actuate="onLoad" draw:mime-type="image/png"/></draw:frame><text:soft-page-break/>Създаваме <text:span text:style-name="T1">status1 </text:span>и <text:span text:style-name="T1">status2, </text:span>които съдържат изходното състояние на двата процеса.</text:p>
      <text:p text:style-name="P36">След това проверяваме дали втория процес е излязал със статус код „<text:span text:style-name="T1">0” </text:span>и ако да, връщаме изходния код на втория процес.</text:p>
      <text:p text:style-name="P36">В противен случай проверяваме дали сигнал е прекъснал процеса и ако да задаваме <text:span text:style-name="T1">exit_code </text:span>да е равно на <text:span text:style-name="T1">128 + </text:span>сигнала.</text:p>
      <text:p text:style-name="P36"/>
      <text:p text:style-name="P36">Накрая връщаме <text:span text:style-name="T1">exit_code.</text:span></text:p>
      <text:p text:style-name="P37"/>
      <text:p text:style-name="P38">Задача 5: <text:span text:style-name="T1">worker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21:05:25.026981100</meta:creation-date>
    <dc:date>2026-06-03T23:56:19.829831500</dc:date>
    <meta:editing-duration>PT45M</meta:editing-duration>
    <meta:editing-cycles>7</meta:editing-cycles>
    <meta:generator>LibreOffice/26.2.3.2$Windows_X86_64 LibreOffice_project/70e089b17412e4cb7773e41413306b17a2328c34</meta:generator>
    <meta:document-statistic meta:table-count="0" meta:image-count="38" meta:object-count="0" meta:page-count="13" meta:paragraph-count="71" meta:word-count="1128" meta:character-count="7089" meta:non-whitespace-character-count="6025"/>
  </office:meta>
</office:document-meta>
</file>